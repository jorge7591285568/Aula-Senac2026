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 você quer projetos mais avançados em Python na área da saúde, aqui está uma lista com arquitetura, tecnologias e funcionalidades para cada um.</text:p>
      <text:h text:style-name="Heading_20_1" text:outline-level="1">1. Sistema de Prontuário Eletrônico (EHR)</text:h>
      <text:h text:style-name="Heading_20_3" text:outline-level="3">Funcionalidades</text:h>
      <text:list text:style-name="L1">
        <text:list-item>
          <text:p text:style-name="P2">Cadastro de pacientes</text:p>
        </text:list-item>
        <text:list-item>
          <text:p text:style-name="P2">Histórico médico completo</text:p>
        </text:list-item>
        <text:list-item>
          <text:p text:style-name="P2">Prescrições digitais</text:p>
        </text:list-item>
        <text:list-item>
          <text:p text:style-name="P2">Upload de exames e documentos</text:p>
        </text:list-item>
        <text:list-item>
          <text:p text:style-name="P2">Controle de usuários e permissões</text:p>
        </text:list-item>
        <text:list-item>
          <text:p text:style-name="P2">Assinatura digital</text:p>
        </text:list-item>
        <text:list-item>
          <text:p text:style-name="P2">Auditoria de alterações</text:p>
        </text:list-item>
      </text:list>
      <text:h text:style-name="Heading_20_3" text:outline-level="3">Tecnologias</text:h>
      <text:list text:style-name="L2">
        <text:list-item>
          <text:p text:style-name="P3">Backend: Python + FastAPI</text:p>
        </text:list-item>
        <text:list-item>
          <text:p text:style-name="P3">Banco: PostgreSQL</text:p>
        </text:list-item>
        <text:list-item>
          <text:p text:style-name="P3">Frontend: React ou Streamlit</text:p>
        </text:list-item>
        <text:list-item>
          <text:p text:style-name="P3">Autenticação: JWT/OAuth2</text:p>
        </text:list-item>
        <text:list-item>
          <text:p text:style-name="P3">Armazenamento: MinIO ou AWS S3</text:p>
        </text:list-item>
      </text:list>
      <text:h text:style-name="Heading_20_3" text:outline-level="3">Estrutura</text:h>
      <text:p text:style-name="Preformatted_20_Text"><text:span text:style-name="Source_20_Text">ehr_system/</text:span></text:p>
      <text:p text:style-name="Preformatted_20_Text"><text:span text:style-name="Source_20_Text">│</text:span></text:p>
      <text:p text:style-name="Preformatted_20_Text"><text:span text:style-name="Source_20_Text">├── api/</text:span></text:p>
      <text:p text:style-name="Preformatted_20_Text"><text:span text:style-name="Source_20_Text">├── models/</text:span></text:p>
      <text:p text:style-name="Preformatted_20_Text"><text:span text:style-name="Source_20_Text">├── services/</text:span></text:p>
      <text:p text:style-name="Preformatted_20_Text"><text:span text:style-name="Source_20_Text">├── auth/</text:span></text:p>
      <text:p text:style-name="Preformatted_20_Text"><text:span text:style-name="Source_20_Text">├── database/</text:span></text:p>
      <text:p text:style-name="Preformatted_20_Text"><text:span text:style-name="Source_20_Text">├── uploads/</text:span></text:p>
      <text:p text:style-name="P1"><text:span text:style-name="Source_20_Text">└── main.py</text:span></text:p>
      <text:h text:style-name="Heading_20_3" text:outline-level="3">Diferencial</text:h>
      <text:p text:style-name="Text_20_body">Implementar padrão HL7/FHIR para interoperabilidade hospitalar.</text:p>
      <text:p text:style-name="Horizontal_20_Line"/>
      <text:h text:style-name="Heading_20_1" text:outline-level="1">2. Dashboard de Indicadores Hospitalares</text:h>
      <text:h text:style-name="Heading_20_3" text:outline-level="3">Indicadores</text:h>
      <text:list text:style-name="L3">
        <text:list-item>
          <text:p text:style-name="P4">Taxa de ocupação</text:p>
        </text:list-item>
        <text:list-item>
          <text:p text:style-name="P4"><text:soft-page-break/>Tempo médio de internação</text:p>
        </text:list-item>
        <text:list-item>
          <text:p text:style-name="P4">Mortalidade</text:p>
        </text:list-item>
        <text:list-item>
          <text:p text:style-name="P4">Giro de leitos</text:p>
        </text:list-item>
        <text:list-item>
          <text:p text:style-name="P4">Taxa de infecção</text:p>
        </text:list-item>
      </text:list>
      <text:h text:style-name="Heading_20_3" text:outline-level="3">Tecnologias</text:h>
      <text:p text:style-name="Preformatted_20_Text"><text:span text:style-name="Source_20_Text">Pandas</text:span></text:p>
      <text:p text:style-name="Preformatted_20_Text"><text:span text:style-name="Source_20_Text">Plotly</text:span></text:p>
      <text:p text:style-name="Preformatted_20_Text"><text:span text:style-name="Source_20_Text">Dash</text:span></text:p>
      <text:p text:style-name="Preformatted_20_Text"><text:span text:style-name="Source_20_Text">SQLAlchemy</text:span></text:p>
      <text:p text:style-name="P1"><text:span text:style-name="Source_20_Text">PostgreSQL</text:span></text:p>
      <text:h text:style-name="Heading_20_3" text:outline-level="3">Exemplo de gráfico</text:h>
      <text:p text:style-name="Preformatted_20_Text"><text:span text:style-name="Source_20_Text">import plotly.express as px</text:span></text:p>
      <text:p text:style-name="Preformatted_20_Text"/>
      <text:p text:style-name="Preformatted_20_Text"><text:span text:style-name="Source_20_Text">fig = px.line(</text:span></text:p>
      <text:p text:style-name="Preformatted_20_Text"><text:span text:style-name="Source_20_Text"><text:s text:c="4"/>df,</text:span></text:p>
      <text:p text:style-name="Preformatted_20_Text"><text:span text:style-name="Source_20_Text"><text:s text:c="4"/>x='data',</text:span></text:p>
      <text:p text:style-name="Preformatted_20_Text"><text:span text:style-name="Source_20_Text"><text:s text:c="4"/>y='ocupacao',</text:span></text:p>
      <text:p text:style-name="Preformatted_20_Text"><text:span text:style-name="Source_20_Text"><text:s text:c="4"/>title='Taxa de Ocupação'</text:span></text:p>
      <text:p text:style-name="Preformatted_20_Text"><text:span text:style-name="Source_20_Text">)</text:span></text:p>
      <text:p text:style-name="Preformatted_20_Text"/>
      <text:p text:style-name="P1"><text:span text:style-name="Source_20_Text">fig.show()</text:span></text:p>
      <text:h text:style-name="Heading_20_3" text:outline-level="3">Recursos Avançados</text:h>
      <text:list text:style-name="L4">
        <text:list-item>
          <text:p text:style-name="P5">Atualização em tempo real</text:p>
        </text:list-item>
        <text:list-item>
          <text:p text:style-name="P5">Alertas automáticos</text:p>
        </text:list-item>
        <text:list-item>
          <text:p text:style-name="P5">Previsão de ocupação usando IA</text:p>
        </text:list-item>
      </text:list>
      <text:p text:style-name="Horizontal_20_Line"/>
      <text:h text:style-name="Heading_20_1" text:outline-level="1">3. Análise de Exames Laboratoriais</text:h>
      <text:h text:style-name="Heading_20_3" text:outline-level="3">Objetivo</text:h>
      <text:p text:style-name="Text_20_body">Interpretar resultados automaticamente.</text:p>
      <text:h text:style-name="Heading_20_3" text:outline-level="3">Exemplo</text:h>
      <text:p text:style-name="Text_20_body">Entrada:</text:p>
      <text:p text:style-name="Preformatted_20_Text"><text:span text:style-name="Source_20_Text">{</text:span></text:p>
      <text:p text:style-name="Preformatted_20_Text"><text:span text:style-name="Source_20_Text"><text:s text:c="2"/>"glicose": 140,</text:span></text:p>
      <text:p text:style-name="Preformatted_20_Text"><text:span text:style-name="Source_20_Text"><text:s text:c="2"/>"colesterol": 260,</text:span></text:p>
      <text:p text:style-name="Preformatted_20_Text"><text:span text:style-name="Source_20_Text"><text:s text:c="2"/>"hemoglobina": 11</text:span></text:p>
      <text:p text:style-name="P1"><text:span text:style-name="Source_20_Text">}</text:span></text:p>
      <text:p text:style-name="Text_20_body">Saída:</text:p>
      <text:p text:style-name="Preformatted_20_Text"><text:span text:style-name="Source_20_Text">Glicose elevada.</text:span></text:p>
      <text:p text:style-name="Preformatted_20_Text"><text:soft-page-break/><text:span text:style-name="Source_20_Text">Colesterol elevado.</text:span></text:p>
      <text:p text:style-name="P1"><text:span text:style-name="Source_20_Text">Possível anemia.</text:span></text:p>
      <text:h text:style-name="Heading_20_3" text:outline-level="3">Tecnologias</text:h>
      <text:p text:style-name="Preformatted_20_Text"><text:span text:style-name="Source_20_Text">Pandas</text:span></text:p>
      <text:p text:style-name="Preformatted_20_Text"><text:span text:style-name="Source_20_Text">NumPy</text:span></text:p>
      <text:p text:style-name="Preformatted_20_Text"><text:span text:style-name="Source_20_Text">Scikit-learn</text:span></text:p>
      <text:p text:style-name="P1"><text:span text:style-name="Source_20_Text">FastAPI</text:span></text:p>
      <text:h text:style-name="Heading_20_3" text:outline-level="3">Recursos</text:h>
      <text:list text:style-name="L5">
        <text:list-item>
          <text:p text:style-name="P6">Leitura de PDF</text:p>
        </text:list-item>
        <text:list-item>
          <text:p text:style-name="P6">OCR</text:p>
        </text:list-item>
        <text:list-item>
          <text:p text:style-name="P6">Comparação com valores de referência</text:p>
        </text:list-item>
        <text:list-item>
          <text:p text:style-name="P6">Geração de laudos</text:p>
        </text:list-item>
      </text:list>
      <text:p text:style-name="Horizontal_20_Line"/>
      <text:h text:style-name="Heading_20_1" text:outline-level="1">4. Detecção de Doenças com Machine Learning</text:h>
      <text:h text:style-name="Heading_20_3" text:outline-level="3">Dataset</text:h>
      <text:list text:style-name="L6">
        <text:list-item>
          <text:p text:style-name="P7">Diabetes</text:p>
        </text:list-item>
        <text:list-item>
          <text:p text:style-name="P7">Doença cardíaca</text:p>
        </text:list-item>
        <text:list-item>
          <text:p text:style-name="P7">Câncer de mama</text:p>
        </text:list-item>
        <text:list-item>
          <text:p text:style-name="P7">Parkinson</text:p>
        </text:list-item>
      </text:list>
      <text:h text:style-name="Heading_20_3" text:outline-level="3">Pipeline</text:h>
      <text:p text:style-name="Preformatted_20_Text"><text:span text:style-name="Source_20_Text">Coleta</text:span></text:p>
      <text:p text:style-name="Preformatted_20_Text"><text:span text:style-name="Source_20_Text"><text:s/>↓</text:span></text:p>
      <text:p text:style-name="Preformatted_20_Text"><text:span text:style-name="Source_20_Text">Limpeza</text:span></text:p>
      <text:p text:style-name="Preformatted_20_Text"><text:span text:style-name="Source_20_Text"><text:s/>↓</text:span></text:p>
      <text:p text:style-name="Preformatted_20_Text"><text:span text:style-name="Source_20_Text">Treinamento</text:span></text:p>
      <text:p text:style-name="Preformatted_20_Text"><text:span text:style-name="Source_20_Text"><text:s/>↓</text:span></text:p>
      <text:p text:style-name="Preformatted_20_Text"><text:span text:style-name="Source_20_Text">Avaliação</text:span></text:p>
      <text:p text:style-name="Preformatted_20_Text"><text:span text:style-name="Source_20_Text"><text:s/>↓</text:span></text:p>
      <text:p text:style-name="P1"><text:span text:style-name="Source_20_Text">Deploy</text:span></text:p>
      <text:h text:style-name="Heading_20_3" text:outline-level="3">Modelo</text:h>
      <text:p text:style-name="Preformatted_20_Text"><text:span text:style-name="Source_20_Text">from sklearn.ensemble import RandomForestClassifier</text:span></text:p>
      <text:p text:style-name="Preformatted_20_Text"/>
      <text:p text:style-name="Preformatted_20_Text"><text:span text:style-name="Source_20_Text">model = RandomForestClassifier()</text:span></text:p>
      <text:p text:style-name="Preformatted_20_Text"/>
      <text:p text:style-name="Preformatted_20_Text"><text:span text:style-name="Source_20_Text">model.fit(X_train, y_train)</text:span></text:p>
      <text:p text:style-name="Preformatted_20_Text"/>
      <text:p text:style-name="P1"><text:span text:style-name="Source_20_Text">pred = model.predict(X_test)</text:span></text:p>
      <text:h text:style-name="Heading_20_3" text:outline-level="3"><text:soft-page-break/>Extras</text:h>
      <text:list text:style-name="L7">
        <text:list-item>
          <text:p text:style-name="P8">Explainable AI (SHAP)</text:p>
        </text:list-item>
        <text:list-item>
          <text:p text:style-name="P8">API de predição</text:p>
        </text:list-item>
        <text:list-item>
          <text:p text:style-name="P8">Dashboard de resultados</text:p>
        </text:list-item>
      </text:list>
      <text:p text:style-name="Horizontal_20_Line"/>
      <text:h text:style-name="Heading_20_1" text:outline-level="1">5. Chatbot para Triagem de Pacientes</text:h>
      <text:h text:style-name="Heading_20_3" text:outline-level="3">Fluxo</text:h>
      <text:p text:style-name="Preformatted_20_Text"><text:span text:style-name="Source_20_Text">Paciente</text:span></text:p>
      <text:p text:style-name="Preformatted_20_Text"><text:span text:style-name="Source_20_Text"><text:s text:c="3"/>↓</text:span></text:p>
      <text:p text:style-name="Preformatted_20_Text"><text:span text:style-name="Source_20_Text">Chatbot</text:span></text:p>
      <text:p text:style-name="Preformatted_20_Text"><text:span text:style-name="Source_20_Text"><text:s text:c="3"/>↓</text:span></text:p>
      <text:p text:style-name="Preformatted_20_Text"><text:span text:style-name="Source_20_Text">Perguntas</text:span></text:p>
      <text:p text:style-name="Preformatted_20_Text"><text:span text:style-name="Source_20_Text"><text:s text:c="3"/>↓</text:span></text:p>
      <text:p text:style-name="Preformatted_20_Text"><text:span text:style-name="Source_20_Text">Classificação de risco</text:span></text:p>
      <text:p text:style-name="Preformatted_20_Text"><text:span text:style-name="Source_20_Text"><text:s text:c="3"/>↓</text:span></text:p>
      <text:p text:style-name="P1"><text:span text:style-name="Source_20_Text">Encaminhamento</text:span></text:p>
      <text:h text:style-name="Heading_20_3" text:outline-level="3">Tecnologias</text:h>
      <text:p text:style-name="Preformatted_20_Text"><text:span text:style-name="Source_20_Text">FastAPI</text:span></text:p>
      <text:p text:style-name="Preformatted_20_Text"><text:span text:style-name="Source_20_Text">OpenAI API</text:span></text:p>
      <text:p text:style-name="Preformatted_20_Text"><text:span text:style-name="Source_20_Text">LangChain</text:span></text:p>
      <text:p text:style-name="P1"><text:span text:style-name="Source_20_Text">SQLite</text:span></text:p>
      <text:h text:style-name="Heading_20_3" text:outline-level="3">Funcionalidades</text:h>
      <text:list text:style-name="L8">
        <text:list-item>
          <text:p text:style-name="P9">Identificação de sintomas</text:p>
        </text:list-item>
        <text:list-item>
          <text:p text:style-name="P9">Priorização de atendimento</text:p>
        </text:list-item>
        <text:list-item>
          <text:p text:style-name="P9">Geração de relatório</text:p>
        </text:list-item>
        <text:list-item>
          <text:p text:style-name="P9">Integração com WhatsApp</text:p>
        </text:list-item>
      </text:list>
      <text:p text:style-name="Horizontal_20_Line"/>
      <text:h text:style-name="Heading_20_1" text:outline-level="1">6. Monitoramento de Sinais Vitais em Tempo Real</text:h>
      <text:h text:style-name="Heading_20_3" text:outline-level="3">Dados</text:h>
      <text:list text:style-name="L9">
        <text:list-item>
          <text:p text:style-name="P10">Frequência cardíaca</text:p>
        </text:list-item>
        <text:list-item>
          <text:p text:style-name="P10">Saturação</text:p>
        </text:list-item>
        <text:list-item>
          <text:p text:style-name="P10">Pressão arterial</text:p>
        </text:list-item>
        <text:list-item>
          <text:p text:style-name="P10">Temperatura</text:p>
        </text:list-item>
      </text:list>
      <text:h text:style-name="Heading_20_3" text:outline-level="3"><text:soft-page-break/>Tecnologias</text:h>
      <text:p text:style-name="Preformatted_20_Text"><text:span text:style-name="Source_20_Text">FastAPI</text:span></text:p>
      <text:p text:style-name="Preformatted_20_Text"><text:span text:style-name="Source_20_Text">WebSocket</text:span></text:p>
      <text:p text:style-name="Preformatted_20_Text"><text:span text:style-name="Source_20_Text">MQTT</text:span></text:p>
      <text:p text:style-name="P1"><text:span text:style-name="Source_20_Text">Redis</text:span></text:p>
      <text:h text:style-name="Heading_20_3" text:outline-level="3">Exemplo</text:h>
      <text:p text:style-name="Preformatted_20_Text"><text:span text:style-name="Source_20_Text">@app.websocket("/monitor")</text:span></text:p>
      <text:p text:style-name="Preformatted_20_Text"><text:span text:style-name="Source_20_Text">async def monitor(ws)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data = get_sensor_data()</text:span></text:p>
      <text:p text:style-name="P1"><text:span text:style-name="Source_20_Text"><text:s text:c="8"/>await ws.send_json(data)</text:span></text:p>
      <text:h text:style-name="Heading_20_3" text:outline-level="3">Recursos</text:h>
      <text:list text:style-name="L10">
        <text:list-item>
          <text:p text:style-name="P11">Alertas críticos</text:p>
        </text:list-item>
        <text:list-item>
          <text:p text:style-name="P11">Histórico temporal</text:p>
        </text:list-item>
        <text:list-item>
          <text:p text:style-name="P11">Dashboard em tempo real</text:p>
        </text:list-item>
      </text:list>
      <text:p text:style-name="Horizontal_20_Line"/>
      <text:h text:style-name="Heading_20_1" text:outline-level="1">7. Sistema de Agendamento de Consultas</text:h>
      <text:h text:style-name="Heading_20_3" text:outline-level="3">Funcionalidades</text:h>
      <text:list text:style-name="L11">
        <text:list-item>
          <text:p text:style-name="P12">Agenda médica</text:p>
        </text:list-item>
        <text:list-item>
          <text:p text:style-name="P12">Reserva online</text:p>
        </text:list-item>
        <text:list-item>
          <text:p text:style-name="P12">Cancelamentos</text:p>
        </text:list-item>
        <text:list-item>
          <text:p text:style-name="P12">Notificações</text:p>
        </text:list-item>
      </text:list>
      <text:h text:style-name="Heading_20_3" text:outline-level="3">Banco</text:h>
      <text:p text:style-name="Preformatted_20_Text"><text:span text:style-name="Source_20_Text">Paciente</text:span></text:p>
      <text:p text:style-name="Preformatted_20_Text"><text:span text:style-name="Source_20_Text">Medico</text:span></text:p>
      <text:p text:style-name="Preformatted_20_Text"><text:span text:style-name="Source_20_Text">Consulta</text:span></text:p>
      <text:p text:style-name="P1"><text:span text:style-name="Source_20_Text">Especialidade</text:span></text:p>
      <text:h text:style-name="Heading_20_3" text:outline-level="3">Tecnologias</text:h>
      <text:p text:style-name="Preformatted_20_Text"><text:span text:style-name="Source_20_Text">FastAPI</text:span></text:p>
      <text:p text:style-name="Preformatted_20_Text"><text:span text:style-name="Source_20_Text">PostgreSQL</text:span></text:p>
      <text:p text:style-name="Preformatted_20_Text"><text:span text:style-name="Source_20_Text">Celery</text:span></text:p>
      <text:p text:style-name="P1"><text:span text:style-name="Source_20_Text">Redis</text:span></text:p>
      <text:h text:style-name="Heading_20_3" text:outline-level="3">Extras</text:h>
      <text:list text:style-name="L12">
        <text:list-item>
          <text:p text:style-name="P13">Integração Google Calendar</text:p>
        </text:list-item>
        <text:list-item>
          <text:p text:style-name="P13">Lembretes por WhatsApp</text:p>
        </text:list-item>
        <text:list-item>
          <text:p text:style-name="P13"><text:soft-page-break/>Lista de espera automática</text:p>
        </text:list-item>
      </text:list>
      <text:p text:style-name="Horizontal_20_Line"/>
      <text:h text:style-name="Heading_20_1" text:outline-level="1">8. Análise de Imagens Médicas com IA</text:h>
      <text:h text:style-name="Heading_20_3" text:outline-level="3">Casos de uso</text:h>
      <text:list text:style-name="L13">
        <text:list-item>
          <text:p text:style-name="P14">Raio-X</text:p>
        </text:list-item>
        <text:list-item>
          <text:p text:style-name="P14">Tomografia</text:p>
        </text:list-item>
        <text:list-item>
          <text:p text:style-name="P14">Ressonância</text:p>
        </text:list-item>
        <text:list-item>
          <text:p text:style-name="P14">Dermatologia</text:p>
        </text:list-item>
      </text:list>
      <text:h text:style-name="Heading_20_3" text:outline-level="3">Tecnologias</text:h>
      <text:p text:style-name="Preformatted_20_Text"><text:span text:style-name="Source_20_Text">TensorFlow</text:span></text:p>
      <text:p text:style-name="Preformatted_20_Text"><text:span text:style-name="Source_20_Text">PyTorch</text:span></text:p>
      <text:p text:style-name="Preformatted_20_Text"><text:span text:style-name="Source_20_Text">OpenCV</text:span></text:p>
      <text:p text:style-name="P1"><text:span text:style-name="Source_20_Text">FastAPI</text:span></text:p>
      <text:h text:style-name="Heading_20_3" text:outline-level="3">Exemplo CNN</text:h>
      <text:p text:style-name="Preformatted_20_Text"><text:span text:style-name="Source_20_Text">import tensorflow as tf</text:span></text:p>
      <text:p text:style-name="Preformatted_20_Text"/>
      <text:p text:style-name="Preformatted_20_Text"><text:span text:style-name="Source_20_Text">model = tf.keras.Sequential([</text:span></text:p>
      <text:p text:style-name="Preformatted_20_Text"><text:span text:style-name="Source_20_Text"><text:s text:c="4"/>tf.keras.layers.Conv2D(</text:span></text:p>
      <text:p text:style-name="Preformatted_20_Text"><text:span text:style-name="Source_20_Text"><text:s text:c="8"/>32,</text:span></text:p>
      <text:p text:style-name="Preformatted_20_Text"><text:span text:style-name="Source_20_Text"><text:s text:c="8"/>(3,3),</text:span></text:p>
      <text:p text:style-name="Preformatted_20_Text"><text:span text:style-name="Source_20_Text"><text:s text:c="8"/>activation='relu'</text:span></text:p>
      <text:p text:style-name="Preformatted_20_Text"><text:span text:style-name="Source_20_Text"><text:s text:c="4"/>),</text:span></text:p>
      <text:p text:style-name="Preformatted_20_Text"><text:span text:style-name="Source_20_Text"><text:s text:c="4"/>tf.keras.layers.MaxPooling2D(),</text:span></text:p>
      <text:p text:style-name="Preformatted_20_Text"><text:span text:style-name="Source_20_Text"><text:s text:c="4"/>tf.keras.layers.Flatten(),</text:span></text:p>
      <text:p text:style-name="Preformatted_20_Text"><text:span text:style-name="Source_20_Text"><text:s text:c="4"/>tf.keras.layers.Dense(</text:span></text:p>
      <text:p text:style-name="Preformatted_20_Text"><text:span text:style-name="Source_20_Text"><text:s text:c="8"/>128,</text:span></text:p>
      <text:p text:style-name="Preformatted_20_Text"><text:span text:style-name="Source_20_Text"><text:s text:c="8"/>activation='relu'</text:span></text:p>
      <text:p text:style-name="Preformatted_20_Text"><text:span text:style-name="Source_20_Text"><text:s text:c="4"/>),</text:span></text:p>
      <text:p text:style-name="Preformatted_20_Text"><text:span text:style-name="Source_20_Text"><text:s text:c="4"/>tf.keras.layers.Dense(</text:span></text:p>
      <text:p text:style-name="Preformatted_20_Text"><text:span text:style-name="Source_20_Text"><text:s text:c="8"/>2,</text:span></text:p>
      <text:p text:style-name="Preformatted_20_Text"><text:span text:style-name="Source_20_Text"><text:s text:c="8"/>activation='softmax'</text:span></text:p>
      <text:p text:style-name="Preformatted_20_Text"><text:span text:style-name="Source_20_Text"><text:s text:c="4"/>)</text:span></text:p>
      <text:p text:style-name="P1"><text:span text:style-name="Source_20_Text">])</text:span></text:p>
      <text:h text:style-name="Heading_20_3" text:outline-level="3">Recursos Avançados</text:h>
      <text:list text:style-name="L14">
        <text:list-item>
          <text:p text:style-name="P15">Classificação automática</text:p>
        </text:list-item>
        <text:list-item>
          <text:p text:style-name="P15">Segmentação de tumores</text:p>
        </text:list-item>
        <text:list-item>
          <text:p text:style-name="P15">Heatmaps (Grad-CAM)</text:p>
        </text:list-item>
        <text:list-item>
          <text:p text:style-name="P15">Upload DICOM</text:p>
        </text:list-item>
      </text:list>
      <text:p text:style-name="Horizontal_20_Line"/>
      <text:h text:style-name="Heading_20_1" text:outline-level="1"><text:soft-page-break/>Projeto Integrado (Nível Profissional)</text:h>
      <text:p text:style-name="Text_20_body">Uma ideia extremamente forte para portfólio é unir tudo em uma única plataforma:</text:p>
      <text:p text:style-name="Preformatted_20_Text"><text:span text:style-name="Source_20_Text">Hospital AI Platform</text:span></text:p>
      <text:p text:style-name="Preformatted_20_Text"><text:span text:style-name="Source_20_Text">│</text:span></text:p>
      <text:p text:style-name="Preformatted_20_Text"><text:span text:style-name="Source_20_Text">├── Prontuário Eletrônico</text:span></text:p>
      <text:p text:style-name="Preformatted_20_Text"><text:span text:style-name="Source_20_Text">├── Agendamento</text:span></text:p>
      <text:p text:style-name="Preformatted_20_Text"><text:span text:style-name="Source_20_Text">├── Dashboard Hospitalar</text:span></text:p>
      <text:p text:style-name="Preformatted_20_Text"><text:span text:style-name="Source_20_Text">├── Chatbot de Triagem</text:span></text:p>
      <text:p text:style-name="Preformatted_20_Text"><text:span text:style-name="Source_20_Text">├── Análise de Exames</text:span></text:p>
      <text:p text:style-name="Preformatted_20_Text"><text:span text:style-name="Source_20_Text">├── Monitoramento em Tempo Real</text:span></text:p>
      <text:p text:style-name="Preformatted_20_Text"><text:span text:style-name="Source_20_Text">├── IA para Diagnóstico</text:span></text:p>
      <text:p text:style-name="P1"><text:span text:style-name="Source_20_Text">└── API REST</text:span></text:p>
      <text:h text:style-name="Heading_20_3" text:outline-level="3">Stack completa</text:h>
      <text:p text:style-name="Preformatted_20_Text"><text:span text:style-name="Source_20_Text">Backend:</text:span></text:p>
      <text:p text:style-name="Preformatted_20_Text"><text:span text:style-name="Source_20_Text">- FastAPI</text:span></text:p>
      <text:p text:style-name="Preformatted_20_Text"><text:span text:style-name="Source_20_Text">- PostgreSQL</text:span></text:p>
      <text:p text:style-name="Preformatted_20_Text"><text:span text:style-name="Source_20_Text">- Redis</text:span></text:p>
      <text:p text:style-name="Preformatted_20_Text"><text:span text:style-name="Source_20_Text">- Celery</text:span></text:p>
      <text:p text:style-name="Preformatted_20_Text"/>
      <text:p text:style-name="Preformatted_20_Text"><text:span text:style-name="Source_20_Text">IA:</text:span></text:p>
      <text:p text:style-name="Preformatted_20_Text"><text:span text:style-name="Source_20_Text">- Scikit-Learn</text:span></text:p>
      <text:p text:style-name="Preformatted_20_Text"><text:span text:style-name="Source_20_Text">- TensorFlow</text:span></text:p>
      <text:p text:style-name="Preformatted_20_Text"><text:span text:style-name="Source_20_Text">- PyTorch</text:span></text:p>
      <text:p text:style-name="Preformatted_20_Text"/>
      <text:p text:style-name="Preformatted_20_Text"><text:span text:style-name="Source_20_Text">Frontend:</text:span></text:p>
      <text:p text:style-name="Preformatted_20_Text"><text:span text:style-name="Source_20_Text">- React</text:span></text:p>
      <text:p text:style-name="Preformatted_20_Text"><text:span text:style-name="Source_20_Text">- Next.js</text:span></text:p>
      <text:p text:style-name="Preformatted_20_Text"/>
      <text:p text:style-name="Preformatted_20_Text"><text:span text:style-name="Source_20_Text">Infra:</text:span></text:p>
      <text:p text:style-name="Preformatted_20_Text"><text:span text:style-name="Source_20_Text">- Docker</text:span></text:p>
      <text:p text:style-name="Preformatted_20_Text"><text:span text:style-name="Source_20_Text">- Nginx</text:span></text:p>
      <text:p text:style-name="Preformatted_20_Text"><text:span text:style-name="Source_20_Text">- GitHub Actions</text:span></text:p>
      <text:p text:style-name="P1"><text:span text:style-name="Source_20_Text">- Kubernetes</text:span></text:p>
      <text:p text:style-name="Text_20_body">Esse tipo de projeto demonstra desenvolvimento web, bancos de dados, APIs, computação em nuvem, processamento de dados e inteligência artificial em um único sistema, sendo excelente para portfólio profissional ou TCC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2T13:12:56.242814391</meta:creation-date>
    <dc:date>2026-06-12T13:13:52.061582028</dc:date>
    <meta:editing-duration>PT58S</meta:editing-duration>
    <meta:editing-cycles>1</meta:editing-cycles>
    <meta:document-statistic meta:table-count="0" meta:image-count="0" meta:object-count="0" meta:page-count="7" meta:paragraph-count="231" meta:word-count="582" meta:character-count="3979" meta:non-whitespace-character-count="3539"/>
    <meta:generator>LibreOffice/24.2.7.2$Linux_X86_64 LibreOffice_project/420$Build-2</meta:generator>
  </office:meta>
</office:document-meta>
</file>