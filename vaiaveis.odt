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Versão da Linguagem Python</text:p>
      <text:p text:style-name="Standard">from platform import python_version</text:p>
      <text:p text:style-name="Standard">print('Versão da Linguagem Python Usada Neste Jupyter Notebook:', python_version())</text:p>
      <text:p text:style-name="Standard"/>
      <text:p text:style-name="Standard">## Números e Operações Matemáticas</text:p>
      <text:p text:style-name="Standard"># Soma</text:p>
      <text:p text:style-name="Standard">5 + 5</text:p>
      <text:p text:style-name="Standard"># Subtração</text:p>
      <text:p text:style-name="Standard">8 – 3</text:p>
      <text:p text:style-name="Standard"># Multiplicação</text:p>
      <text:p text:style-name="Standard">8 * 3</text:p>
      <text:p text:style-name="Standard"># Divisão</text:p>
      <text:p text:style-name="Standard">9 / 2</text:p>
      <text:p text:style-name="Standard"># Potência</text:p>
      <text:p text:style-name="Standard">6 ** 2 <text:s/></text:p>
      <text:p text:style-name="Standard"># Módulo</text:p>
      <text:p text:style-name="Standard">10 % 3 <text:s/></text:p>
      <text:p text:style-name="Standard"/>
      <text:p text:style-name="Standard">### Função Type</text:p>
      <text:p text:style-name="Standard">type(5)</text:p>
      <text:p text:style-name="Standard">type(5.0)</text:p>
      <text:p text:style-name="Standard">a = 'Eu sou uma string'</text:p>
      <text:p text:style-name="Standard">type(a)</text:p>
      <text:p text:style-name="Standard"/>
      <text:p text:style-name="Standard">### Operações com números float</text:p>
      <text:p text:style-name="Standard">3.1 + 6.4</text:p>
      <text:p text:style-name="Standard">4 + 4.0</text:p>
      <text:p text:style-name="Standard"># Resultado é um número float</text:p>
      <text:p text:style-name="Standard">4 / 2</text:p>
      <text:p text:style-name="Standard"># Resultado é um número inteiro</text:p>
      <text:p text:style-name="Standard">4 // 2</text:p>
      <text:p text:style-name="Standard">4 / 3.0</text:p>
      <text:p text:style-name="Standard">4 // 3.0</text:p>
      <text:p text:style-name="Standard"/>
      <text:p text:style-name="Standard">### Conversão</text:p>
      <text:p text:style-name="Standard">float(9)</text:p>
      <text:p text:style-name="Standard">int(6.0)</text:p>
      <text:p text:style-name="Standard"/>
      <text:p text:style-name="Standard"/>
      <text:p text:style-name="Standard">### Hexadecimal e Binário</text:p>
      <text:p text:style-name="Standard">hex(394)</text:p>
      <text:p text:style-name="Standard">hex(217)</text:p>
      <text:p text:style-name="Standard">bin(286)</text:p>
      <text:p text:style-name="Standard">bin(390)</text:p>
      <text:p text:style-name="Standard"/>
      <text:p text:style-name="Standard">### Funções abs, round e pow</text:p>
      <text:p text:style-name="Standard"/>
      <text:p text:style-name="Standard"># Retorna o valor absoluto</text:p>
      <text:p text:style-name="Standard">abs(-8)</text:p>
      <text:p text:style-name="Standard"># Retorna o valor absoluto</text:p>
      <text:p text:style-name="Standard">abs(8)</text:p>
      <text:p text:style-name="Standard"># Retorna o valor com arredondamento</text:p>
      <text:p text:style-name="Standard"><text:soft-page-break/>round(3.14151922,2)</text:p>
      <text:p text:style-name="Standard"># Potência</text:p>
      <text:p text:style-name="Standard">pow(4,2)</text:p>
      <text:p text:style-name="Standard"># Potência</text:p>
      <text:p text:style-name="Standard">pow(5,3)</text:p>
      <text:p text:style-name="Standard"/>
      <text:p text:style-name="Standard"/>
      <text:p text:style-name="Standard"/>
      <text:p text:style-name="Standard"/>
      <text:p text:style-name="Standard"/>
      <text:p text:style-name="Standard"># Exercício 1 - Imprima na tela os números de 1 a 10. Use uma lista para armazenar os números.</text:p>
      <text:p text:style-name="Standard"/>
      <text:p text:style-name="Standard">lista = [1,2,3,4,5,6,7,8,9,10]</text:p>
      <text:p text:style-name="Standard">lista</text:p>
      <text:p text:style-name="Standard"/>
      <text:p text:style-name="Standard"># Exercício 2 - Crie uma lista de 5 objetos e imprima na tela</text:p>
      <text:p text:style-name="Standard"/>
      <text:p text:style-name="Standard">list1 = ['carros','viagem','diversao','comidas','dinheiro']</text:p>
      <text:p text:style-name="Standard">list1</text:p>
      <text:p text:style-name="Standard"/>
      <text:p text:style-name="Standard"># Exercício 3 - Crie duas strings e concatene as duas em uma terceira string</text:p>
      <text:p text:style-name="Standard"/>
      <text:p text:style-name="Standard">f1 = 'jorge '</text:p>
      <text:p text:style-name="Standard">f2 = 'mendes'</text:p>
      <text:p text:style-name="Standard">f3_f = f1 + f2</text:p>
      <text:p text:style-name="Standard">f3_f</text:p>
      <text:p text:style-name="Standard"/>
      <text:p text:style-name="Standard"># Exercício 4 - Crie uma tupla com os seguintes elementos: 1, 2, 2, 3, 4, 4, 4, 5 e depois utilize a função count do objeto tupla para verificar quantas vezes o número 4 aparece na tupla</text:p>
      <text:p text:style-name="Standard"/>
      <text:p text:style-name="Standard">tup = (1,2,2,3,4,4,4,5)</text:p>
      <text:p text:style-name="Standard">tup.count(4)</text:p>
      <text:p text:style-name="Standard"/>
      <text:p text:style-name="Standard"># Exercício 5 - Crie um dicionário vazio e imprima na tela</text:p>
      <text:p text:style-name="Standard"/>
      <text:p text:style-name="Standard">dict3 = {}</text:p>
      <text:p text:style-name="Standard">dict3</text:p>
      <text:p text:style-name="Standard"/>
      <text:p text:style-name="Standard"># Exercício 6 - Crie um dicionário com 3 chaves e 3 valores e imprima na tela</text:p>
      <text:p text:style-name="Standard"/>
      <text:p text:style-name="Standard">dict = { 'k1':("ontem",1),'k2':("hoje",2),'k3':("amanha",3) }</text:p>
      <text:p text:style-name="Standard">dict</text:p>
      <text:p text:style-name="Standard"/>
      <text:p text:style-name="Standard"># Exercício 7 - Adicione mais um elemento ao dicionário criado no exercício anterior e imprima na tela</text:p>
      <text:p text:style-name="Standard"/>
      <text:p text:style-name="Standard">dict['k4'] = ("dias da semana",7)</text:p>
      <text:p text:style-name="Standard">dict</text:p>
      <text:p text:style-name="Standard"/>
      <text:p text:style-name="Standard"># Exercício 8 - Crie um dicionário com 3 chaves e 3 valores. Um dos valores deve ser uma lista de 2 elementos numéricos. </text:p>
      <text:p text:style-name="Standard"/>
      <text:p text:style-name="Standard"><text:soft-page-break/># Imprima o dicionário na tela.</text:p>
      <text:p text:style-name="Standard">dict2 = {'chave':'internet','chave1':'analisededados','chave2':[100,50]}</text:p>
      <text:p text:style-name="Standard">dict2</text:p>
      <text:p text:style-name="Standard"/>
      <text:p text:style-name="Standard"># Exercício 9 - Crie uma lista de 4 elementos.</text:p>
      <text:p text:style-name="Standard"># O primeiro elemento deve ser uma string, </text:p>
      <text:p text:style-name="Standard"># o segundo uma tupla de 2 elementos,</text:p>
      <text:p text:style-name="Standard"># o terceiro um dcionário com 2 chaves e 2 valores e </text:p>
      <text:p text:style-name="Standard"># o quarto elemento um valor do tipo float.</text:p>
      <text:p text:style-name="Standard"># Imprima a lista na tela.</text:p>
      <text:p text:style-name="Standard">list = ['string',(100,50),{'k1':'v1','k2':'v2'},50.25]</text:p>
      <text:p text:style-name="Standard">list</text:p>
      <text:p text:style-name="Standard"/>
      <text:p text:style-name="Standard"># Exercício 10 - Considere a string abaixo. Imprima na tela apenas os caracteres da posição 1 a 18.</text:p>
      <text:p text:style-name="Standard"/>
      <text:p text:style-name="Standard">frase = 'Cientista de Dados é o profissional mais sexy do século XXI'</text:p>
      <text:p text:style-name="Standard">frase[0:18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9T13:13:13.760983424</meta:creation-date>
    <dc:date>2026-06-09T13:38:17.414236470</dc:date>
    <meta:editing-duration>PT2M45S</meta:editing-duration>
    <meta:editing-cycles>1</meta:editing-cycles>
    <meta:document-statistic meta:table-count="0" meta:image-count="0" meta:object-count="0" meta:page-count="3" meta:paragraph-count="87" meta:word-count="441" meta:character-count="2402" meta:non-whitespace-character-count="2040"/>
    <meta:generator>LibreOffice/24.2.7.2$Linux_X86_64 LibreOffice_project/420$Build-2</meta:generator>
  </office:meta>
</office:document-meta>
</file>