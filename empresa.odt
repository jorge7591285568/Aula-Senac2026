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u requisito descreve uma plataforma SaaS completa de vendas digitais. A melhor abordagem é projetar o sistema com arquitetura escalável desde o início, permitindo evoluir de venda de e-books para cursos, assinaturas, área de membros e aplicativos móveis.</text:p>
      <text:h text:style-name="Heading_20_1" text:outline-level="1">PASSOS DIGITAL STORE</text:h>
      <text:p text:style-name="Text_20_body"><text:span text:style-name="Strong_20_Emphasis">Proprietário:</text:span> Moizes Passos</text:p>
      <text:p text:style-name="Text_20_body"><text:span text:style-name="Strong_20_Emphasis">Versão Inicial:</text:span> Venda automatizada de e-books e produtos digitais.</text:p>
      <text:p text:style-name="Horizontal_20_Line"/>
      <text:h text:style-name="Heading_20_1" text:outline-level="1">ARQUITETURA GERAL</text:h>
      <text:p text:style-name="Preformatted_20_Text"><text:span text:style-name="Source_20_Text">Frontend (Next.js + React + Tailwind)</text:span></text:p>
      <text:p text:style-name="Preformatted_20_Text"/>
      <text:p text:style-name="Preformatted_20_Text"><text:span text:style-name="Source_20_Text"><text:s text:c="8"/>↓</text:span></text:p>
      <text:p text:style-name="Preformatted_20_Text"/>
      <text:p text:style-name="Preformatted_20_Text"><text:span text:style-name="Source_20_Text">API Backend (Node.js + Express)</text:span></text:p>
      <text:p text:style-name="Preformatted_20_Text"/>
      <text:p text:style-name="Preformatted_20_Text"><text:span text:style-name="Source_20_Text"><text:s text:c="8"/>↓</text:span></text:p>
      <text:p text:style-name="Preformatted_20_Text"/>
      <text:p text:style-name="Preformatted_20_Text"><text:span text:style-name="Source_20_Text">PostgreSQL</text:span></text:p>
      <text:p text:style-name="Preformatted_20_Text"/>
      <text:p text:style-name="Preformatted_20_Text"><text:span text:style-name="Source_20_Text"><text:s text:c="8"/>↓</text:span></text:p>
      <text:p text:style-name="Preformatted_20_Text"/>
      <text:p text:style-name="Preformatted_20_Text"><text:span text:style-name="Source_20_Text">Integrações</text:span></text:p>
      <text:p text:style-name="Preformatted_20_Text"/>
      <text:p text:style-name="Preformatted_20_Text"><text:span text:style-name="Source_20_Text">├── Mercado Pago</text:span></text:p>
      <text:p text:style-name="Preformatted_20_Text"><text:span text:style-name="Source_20_Text">├── WhatsApp (Z-API)</text:span></text:p>
      <text:p text:style-name="Preformatted_20_Text"><text:span text:style-name="Source_20_Text">├── E-mail (SMTP / SendGrid)</text:span></text:p>
      <text:p text:style-name="Preformatted_20_Text"><text:span text:style-name="Source_20_Text">├── Armazenamento (AWS S3)</text:span></text:p>
      <text:p text:style-name="P1"><text:span text:style-name="Source_20_Text">└── Sistema de Afiliados</text:span></text:p>
      <text:p text:style-name="Horizontal_20_Line"/>
      <text:h text:style-name="Heading_20_1" text:outline-level="1">MÓDULOS DO SISTEMA</text:h>
      <text:h text:style-name="Heading_20_2" text:outline-level="2">1. LANDING PAGE</text:h>
      <text:h text:style-name="Heading_20_3" text:outline-level="3">URL</text:h>
      <text:p text:style-name="P1"><text:span text:style-name="Source_20_Text">https://passosdigitalstore.com/produto/ebook-x</text:span></text:p>
      <text:h text:style-name="Heading_20_3" text:outline-level="3">Componentes</text:h>
      <text:h text:style-name="Heading_20_3" text:outline-level="3">Hero Section</text:h>
      <text:list text:style-name="L1">
        <text:list-item>
          <text:p text:style-name="P4">Banner principal</text:p>
        </text:list-item>
        <text:list-item>
          <text:p text:style-name="P4">Nome do produto</text:p>
        </text:list-item>
        <text:list-item>
          <text:p text:style-name="P4">Subtítulo</text:p>
        </text:list-item>
        <text:list-item>
          <text:p text:style-name="P4"><text:soft-page-break/>CTA Comprar Agora</text:p>
        </text:list-item>
      </text:list>
      <text:h text:style-name="Heading_20_3" text:outline-level="3">Benefícios</text:h>
      <text:p text:style-name="Preformatted_20_Text"><text:span text:style-name="Source_20_Text">✓ Aprenda mais rápido</text:span></text:p>
      <text:p text:style-name="Preformatted_20_Text"><text:span text:style-name="Source_20_Text">✓ Conteúdo atualizado</text:span></text:p>
      <text:p text:style-name="Preformatted_20_Text"><text:span text:style-name="Source_20_Text">✓ Download imediato</text:span></text:p>
      <text:p text:style-name="P1"><text:span text:style-name="Source_20_Text">✓ Suporte incluso</text:span></text:p>
      <text:h text:style-name="Heading_20_3" text:outline-level="3">Sobre o Produto</text:h>
      <text:p text:style-name="Text_20_body">Descrição detalhada.</text:p>
      <text:h text:style-name="Heading_20_3" text:outline-level="3">Depoimentos</text:h>
      <text:p text:style-name="Text_20_body">Cards com avaliações.</text:p>
      <text:h text:style-name="Heading_20_3" text:outline-level="3">Garantia</text:h>
      <text:p text:style-name="Preformatted_20_Text"><text:span text:style-name="Source_20_Text">Garantia de 7 dias</text:span></text:p>
      <text:p text:style-name="P1"><text:span text:style-name="Source_20_Text">ou seu dinheiro de volta.</text:span></text:p>
      <text:h text:style-name="Heading_20_3" text:outline-level="3">FAQ</text:h>
      <text:p text:style-name="Text_20_body">Accordion responsivo.</text:p>
      <text:h text:style-name="Heading_20_3" text:outline-level="3">Rodapé</text:h>
      <text:list text:style-name="L2">
        <text:list-item>
          <text:p text:style-name="P5">Política de Privacidade</text:p>
        </text:list-item>
        <text:list-item>
          <text:p text:style-name="P5">Termos de Uso</text:p>
        </text:list-item>
        <text:list-item>
          <text:p text:style-name="P5">Contato</text:p>
        </text:list-item>
      </text:list>
      <text:p text:style-name="Horizontal_20_Line"/>
      <text:h text:style-name="Heading_20_1" text:outline-level="1">DESIGN SYSTEM</text:h>
      <text:h text:style-name="Heading_20_3" text:outline-level="3">Cores</text:h>
      <text:p text:style-name="Preformatted_20_Text"><text:span text:style-name="Source_20_Text">Primária:</text:span></text:p>
      <text:p text:style-name="Preformatted_20_Text"><text:span text:style-name="Source_20_Text">#0B3D91</text:span></text:p>
      <text:p text:style-name="Preformatted_20_Text"/>
      <text:p text:style-name="Preformatted_20_Text"><text:span text:style-name="Source_20_Text">Secundária:</text:span></text:p>
      <text:p text:style-name="Preformatted_20_Text"><text:span text:style-name="Source_20_Text">#D4AF37</text:span></text:p>
      <text:p text:style-name="Preformatted_20_Text"/>
      <text:p text:style-name="Preformatted_20_Text"><text:span text:style-name="Source_20_Text">Fundo:</text:span></text:p>
      <text:p text:style-name="Preformatted_20_Text"><text:span text:style-name="Source_20_Text">#FFFFFF</text:span></text:p>
      <text:p text:style-name="Preformatted_20_Text"/>
      <text:p text:style-name="Preformatted_20_Text"><text:span text:style-name="Source_20_Text">Texto:</text:span></text:p>
      <text:p text:style-name="P1"><text:span text:style-name="Source_20_Text">#1F2937</text:span></text:p>
      <text:h text:style-name="Heading_20_3" text:outline-level="3">Fonte</text:h>
      <text:p text:style-name="P1"><text:span text:style-name="Source_20_Text">Poppins</text:span></text:p>
      <text:h text:style-name="Heading_20_3" text:outline-level="3"><text:soft-page-break/>Responsividade</text:h>
      <text:p text:style-name="Preformatted_20_Text"><text:span text:style-name="Source_20_Text">Mobile First</text:span></text:p>
      <text:p text:style-name="Preformatted_20_Text"><text:span text:style-name="Source_20_Text">Tablet</text:span></text:p>
      <text:p text:style-name="P1"><text:span text:style-name="Source_20_Text">Desktop</text:span></text:p>
      <text:p text:style-name="Horizontal_20_Line"/>
      <text:h text:style-name="Heading_20_1" text:outline-level="1">ÁREA ADMINISTRATIVA</text:h>
      <text:h text:style-name="Heading_20_2" text:outline-level="2">Login</text:h>
      <text:p text:style-name="Text_20_body">Campos:</text:p>
      <text:p text:style-name="Preformatted_20_Text"><text:span text:style-name="Source_20_Text">Email</text:span></text:p>
      <text:p text:style-name="Preformatted_20_Text"><text:span text:style-name="Source_20_Text">Senha</text:span></text:p>
      <text:p text:style-name="P1"><text:span text:style-name="Source_20_Text">Captcha</text:span></text:p>
      <text:p text:style-name="Text_20_body">Recursos:</text:p>
      <text:p text:style-name="Preformatted_20_Text"><text:span text:style-name="Source_20_Text">JWT</text:span></text:p>
      <text:p text:style-name="Preformatted_20_Text"><text:span text:style-name="Source_20_Text">Refresh Token</text:span></text:p>
      <text:p text:style-name="P1"><text:span text:style-name="Source_20_Text">2FA opcional</text:span></text:p>
      <text:p text:style-name="Horizontal_20_Line"/>
      <text:h text:style-name="Heading_20_1" text:outline-level="1">DASHBOARD</text:h>
      <text:p text:style-name="Text_20_body">Indicadores:</text:p>
      <text:p text:style-name="Preformatted_20_Text"><text:span text:style-name="Source_20_Text">Total de Vendas</text:span></text:p>
      <text:p text:style-name="Preformatted_20_Text"/>
      <text:p text:style-name="Preformatted_20_Text"><text:span text:style-name="Source_20_Text">Faturamento Hoje</text:span></text:p>
      <text:p text:style-name="Preformatted_20_Text"/>
      <text:p text:style-name="Preformatted_20_Text"><text:span text:style-name="Source_20_Text">Faturamento Mês</text:span></text:p>
      <text:p text:style-name="Preformatted_20_Text"/>
      <text:p text:style-name="Preformatted_20_Text"><text:span text:style-name="Source_20_Text">Clientes</text:span></text:p>
      <text:p text:style-name="Preformatted_20_Text"/>
      <text:p text:style-name="Preformatted_20_Text"><text:span text:style-name="Source_20_Text">Produtos</text:span></text:p>
      <text:p text:style-name="Preformatted_20_Text"/>
      <text:p text:style-name="Preformatted_20_Text"><text:span text:style-name="Source_20_Text">Conversão</text:span></text:p>
      <text:p text:style-name="Preformatted_20_Text"/>
      <text:p text:style-name="Preformatted_20_Text"><text:span text:style-name="Source_20_Text">Ticket Médio</text:span></text:p>
      <text:p text:style-name="Preformatted_20_Text"/>
      <text:p text:style-name="P1"><text:span text:style-name="Source_20_Text">Afiliados Ativos</text:span></text:p>
      <text:p text:style-name="Text_20_body">Gráficos:</text:p>
      <text:p text:style-name="Preformatted_20_Text"><text:span text:style-name="Source_20_Text">Vendas por dia</text:span></text:p>
      <text:p text:style-name="Preformatted_20_Text"><text:span text:style-name="Source_20_Text">Receita mensal</text:span></text:p>
      <text:p text:style-name="P1"><text:span text:style-name="Source_20_Text">Produtos mais vendidos</text:span></text:p>
      <text:p text:style-name="Horizontal_20_Line"/>
      <text:h text:style-name="Heading_20_1" text:outline-level="1"><text:soft-page-break/>CADASTRO DE PRODUTOS</text:h>
      <text:h text:style-name="Heading_20_2" text:outline-level="2">Campos</text:h>
      <text:p text:style-name="Preformatted_20_Text"><text:span text:style-name="Source_20_Text">Nome</text:span></text:p>
      <text:p text:style-name="Preformatted_20_Text"/>
      <text:p text:style-name="Preformatted_20_Text"><text:span text:style-name="Source_20_Text">Slug</text:span></text:p>
      <text:p text:style-name="Preformatted_20_Text"/>
      <text:p text:style-name="Preformatted_20_Text"><text:span text:style-name="Source_20_Text">Categoria</text:span></text:p>
      <text:p text:style-name="Preformatted_20_Text"/>
      <text:p text:style-name="Preformatted_20_Text"><text:span text:style-name="Source_20_Text">Descrição</text:span></text:p>
      <text:p text:style-name="Preformatted_20_Text"/>
      <text:p text:style-name="Preformatted_20_Text"><text:span text:style-name="Source_20_Text">Valor</text:span></text:p>
      <text:p text:style-name="Preformatted_20_Text"/>
      <text:p text:style-name="Preformatted_20_Text"><text:span text:style-name="Source_20_Text">Valor Promocional</text:span></text:p>
      <text:p text:style-name="Preformatted_20_Text"/>
      <text:p text:style-name="Preformatted_20_Text"><text:span text:style-name="Source_20_Text">Imagem</text:span></text:p>
      <text:p text:style-name="Preformatted_20_Text"/>
      <text:p text:style-name="Preformatted_20_Text"><text:span text:style-name="Source_20_Text">PDF Principal</text:span></text:p>
      <text:p text:style-name="Preformatted_20_Text"/>
      <text:p text:style-name="Preformatted_20_Text"><text:span text:style-name="Source_20_Text">Bônus</text:span></text:p>
      <text:p text:style-name="Preformatted_20_Text"/>
      <text:p text:style-name="P1"><text:span text:style-name="Source_20_Text">Status</text:span></text:p>
      <text:h text:style-name="Heading_20_3" text:outline-level="3">Status</text:h>
      <text:p text:style-name="Preformatted_20_Text"><text:span text:style-name="Source_20_Text">Ativo</text:span></text:p>
      <text:p text:style-name="Preformatted_20_Text"><text:span text:style-name="Source_20_Text">Inativo</text:span></text:p>
      <text:p text:style-name="P1"><text:span text:style-name="Source_20_Text">Rascunho</text:span></text:p>
      <text:p text:style-name="Horizontal_20_Line"/>
      <text:h text:style-name="Heading_20_1" text:outline-level="1">FLUXO DE COMPRA</text:h>
      <text:p text:style-name="Preformatted_20_Text"><text:span text:style-name="Source_20_Text">Cliente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Landing Page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prar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Mercado Pag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Pagamento Aprovad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Webhook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Sistema</text:span></text:p>
      <text:p text:style-name="Preformatted_20_Text"><text:soft-page-break/></text:p>
      <text:p text:style-name="Preformatted_20_Text"><text:span text:style-name="Source_20_Text">↓</text:span></text:p>
      <text:p text:style-name="Preformatted_20_Text"/>
      <text:p text:style-name="Preformatted_20_Text"><text:span text:style-name="Source_20_Text">Entrega Automática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WhatsApp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E-mai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Área do Cliente</text:span></text:p>
      <text:p text:style-name="Horizontal_20_Line"/>
      <text:h text:style-name="Heading_20_1" text:outline-level="1">INTEGRAÇÃO MERCADO PAGO</text:h>
      <text:h text:style-name="Heading_20_3" text:outline-level="3">Métodos</text:h>
      <text:p text:style-name="Preformatted_20_Text"><text:span text:style-name="Source_20_Text">PIX</text:span></text:p>
      <text:p text:style-name="Preformatted_20_Text"/>
      <text:p text:style-name="Preformatted_20_Text"><text:span text:style-name="Source_20_Text">Cartão Crédito</text:span></text:p>
      <text:p text:style-name="Preformatted_20_Text"/>
      <text:p text:style-name="Preformatted_20_Text"><text:span text:style-name="Source_20_Text">Cartão Débito</text:span></text:p>
      <text:p text:style-name="Preformatted_20_Text"/>
      <text:p text:style-name="P1"><text:span text:style-name="Source_20_Text">Boleto</text:span></text:p>
      <text:h text:style-name="Heading_20_3" text:outline-level="3">Checkout</text:h>
      <text:p text:style-name="P1"><text:span text:style-name="Source_20_Text">Checkout Pro</text:span></text:p>
      <text:p text:style-name="Text_20_body">Endpoint:</text:p>
      <text:p text:style-name="P1"><text:span text:style-name="Source_20_Text">POST /api/payments/create</text:span></text:p>
      <text:p text:style-name="Horizontal_20_Line"/>
      <text:h text:style-name="Heading_20_1" text:outline-level="1">WEBHOOK</text:h>
      <text:p text:style-name="Text_20_body">Endpoint</text:p>
      <text:p text:style-name="P1"><text:span text:style-name="Source_20_Text">POST /api/webhooks/mercadopago</text:span></text:p>
      <text:p text:style-name="Text_20_body">Evento:</text:p>
      <text:p text:style-name="Preformatted_20_Text"><text:span text:style-name="Source_20_Text">{</text:span></text:p>
      <text:p text:style-name="Preformatted_20_Text"><text:span text:style-name="Source_20_Text"><text:s text:c="2"/>"action": "payment.updated",</text:span></text:p>
      <text:p text:style-name="Preformatted_20_Text"><text:span text:style-name="Source_20_Text"><text:s text:c="2"/>"data": {</text:span></text:p>
      <text:p text:style-name="Preformatted_20_Text"><text:span text:style-name="Source_20_Text"><text:s text:c="4"/>"id": "123456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<text:soft-page-break/>PROCESSAMENTO AUTOMÁTICO</text:h>
      <text:p text:style-name="Text_20_body">Após:</text:p>
      <text:p text:style-name="P1"><text:span text:style-name="Source_20_Text">status = approved</text:span></text:p>
      <text:p text:style-name="Text_20_body">Executar:</text:p>
      <text:p text:style-name="Preformatted_20_Text"><text:span text:style-name="Source_20_Text">1 Salvar venda</text:span></text:p>
      <text:p text:style-name="Preformatted_20_Text"/>
      <text:p text:style-name="Preformatted_20_Text"><text:span text:style-name="Source_20_Text">2 Atualizar dashboard</text:span></text:p>
      <text:p text:style-name="Preformatted_20_Text"/>
      <text:p text:style-name="Preformatted_20_Text"><text:span text:style-name="Source_20_Text">3 Liberar download</text:span></text:p>
      <text:p text:style-name="Preformatted_20_Text"/>
      <text:p text:style-name="Preformatted_20_Text"><text:span text:style-name="Source_20_Text">4 Enviar WhatsApp</text:span></text:p>
      <text:p text:style-name="Preformatted_20_Text"/>
      <text:p text:style-name="Preformatted_20_Text"><text:span text:style-name="Source_20_Text">5 Enviar e-mail</text:span></text:p>
      <text:p text:style-name="Preformatted_20_Text"/>
      <text:p text:style-name="P1"><text:span text:style-name="Source_20_Text">6 Gerar comprovante</text:span></text:p>
      <text:p text:style-name="Horizontal_20_Line"/>
      <text:h text:style-name="Heading_20_1" text:outline-level="1">ENTREGA AUTOMÁTICA WHATSAPP</text:h>
      <text:h text:style-name="Heading_20_2" text:outline-level="2">Integração</text:h>
      <text:h text:style-name="Heading_20_3" text:outline-level="3">Opção 1</text:h>
      <text:p text:style-name="Text_20_body">Z-API</text:p>
      <text:h text:style-name="Heading_20_3" text:outline-level="3">Opção 2</text:h>
      <text:p text:style-name="Text_20_body">WhatsApp Business API</text:p>
      <text:p text:style-name="Text_20_body">Mensagem:</text:p>
      <text:p text:style-name="Preformatted_20_Text"><text:span text:style-name="Source_20_Text">Olá {nome}.</text:span></text:p>
      <text:p text:style-name="Preformatted_20_Text"/>
      <text:p text:style-name="Preformatted_20_Text"><text:span text:style-name="Source_20_Text">Recebemos a confirmação do seu pagamento.</text:span></text:p>
      <text:p text:style-name="Preformatted_20_Text"/>
      <text:p text:style-name="Preformatted_20_Text"><text:span text:style-name="Source_20_Text">Produto:</text:span></text:p>
      <text:p text:style-name="Preformatted_20_Text"><text:span text:style-name="Source_20_Text">{produto}</text:span></text:p>
      <text:p text:style-name="Preformatted_20_Text"/>
      <text:p text:style-name="Preformatted_20_Text"><text:span text:style-name="Source_20_Text">Seu acesso:</text:span></text:p>
      <text:p text:style-name="Preformatted_20_Text"/>
      <text:p text:style-name="Preformatted_20_Text"><text:span text:style-name="Source_20_Text">{link}</text:span></text:p>
      <text:p text:style-name="Preformatted_20_Text"/>
      <text:p text:style-name="Preformatted_20_Text"><text:span text:style-name="Source_20_Text">Obrigado pela compra.</text:span></text:p>
      <text:p text:style-name="Preformatted_20_Text"/>
      <text:p text:style-name="P1"><text:span text:style-name="Source_20_Text">Equipe Passos Digital Store.</text:span></text:p>
      <text:p text:style-name="Horizontal_20_Line"/>
      <text:h text:style-name="Heading_20_1" text:outline-level="1">ENTREGA POR E-MAIL</text:h>
      <text:p text:style-name="Text_20_body">Assunto:</text:p>
      <text:p text:style-name="P1"><text:soft-page-break/><text:span text:style-name="Source_20_Text">Sua compra foi aprovada</text:span></text:p>
      <text:p text:style-name="Text_20_body">Conteúdo:</text:p>
      <text:p text:style-name="Preformatted_20_Text"><text:span text:style-name="Source_20_Text">Dados da compra</text:span></text:p>
      <text:p text:style-name="Preformatted_20_Text"/>
      <text:p text:style-name="Preformatted_20_Text"><text:span text:style-name="Source_20_Text">Produto adquirido</text:span></text:p>
      <text:p text:style-name="Preformatted_20_Text"/>
      <text:p text:style-name="Preformatted_20_Text"><text:span text:style-name="Source_20_Text">Link para download</text:span></text:p>
      <text:p text:style-name="Preformatted_20_Text"/>
      <text:p text:style-name="Preformatted_20_Text"><text:span text:style-name="Source_20_Text">Suporte</text:span></text:p>
      <text:p text:style-name="Preformatted_20_Text"/>
      <text:p text:style-name="P1"><text:span text:style-name="Source_20_Text">Comprovante</text:span></text:p>
      <text:p text:style-name="Horizontal_20_Line"/>
      <text:h text:style-name="Heading_20_1" text:outline-level="1">ÁREA DO CLIENTE</text:h>
      <text:h text:style-name="Heading_20_2" text:outline-level="2">Recursos</text:h>
      <text:h text:style-name="Heading_20_3" text:outline-level="3">Login</text:h>
      <text:p text:style-name="Preformatted_20_Text"><text:span text:style-name="Source_20_Text">Email</text:span></text:p>
      <text:p text:style-name="P1"><text:span text:style-name="Source_20_Text">Senha</text:span></text:p>
      <text:h text:style-name="Heading_20_3" text:outline-level="3">Dashboard</text:h>
      <text:p text:style-name="Preformatted_20_Text"><text:span text:style-name="Source_20_Text">Minhas Compras</text:span></text:p>
      <text:p text:style-name="Preformatted_20_Text"/>
      <text:p text:style-name="Preformatted_20_Text"><text:span text:style-name="Source_20_Text">Downloads</text:span></text:p>
      <text:p text:style-name="Preformatted_20_Text"/>
      <text:p text:style-name="Preformatted_20_Text"><text:span text:style-name="Source_20_Text">Atualizar Perfil</text:span></text:p>
      <text:p text:style-name="Preformatted_20_Text"/>
      <text:p text:style-name="P1"><text:span text:style-name="Source_20_Text">Alterar Senha</text:span></text:p>
      <text:p text:style-name="Horizontal_20_Line"/>
      <text:h text:style-name="Heading_20_1" text:outline-level="1">SISTEMA DE AFILIADOS</text:h>
      <text:h text:style-name="Heading_20_2" text:outline-level="2">Cadastro</text:h>
      <text:p text:style-name="Preformatted_20_Text"><text:span text:style-name="Source_20_Text">Nome</text:span></text:p>
      <text:p text:style-name="Preformatted_20_Text"/>
      <text:p text:style-name="Preformatted_20_Text"><text:span text:style-name="Source_20_Text">Email</text:span></text:p>
      <text:p text:style-name="Preformatted_20_Text"/>
      <text:p text:style-name="Preformatted_20_Text"><text:span text:style-name="Source_20_Text">CPF</text:span></text:p>
      <text:p text:style-name="Preformatted_20_Text"/>
      <text:p text:style-name="P1"><text:span text:style-name="Source_20_Text">PIX</text:span></text:p>
      <text:p text:style-name="Horizontal_20_Line"/>
      <text:h text:style-name="Heading_20_2" text:outline-level="2">Link de Afiliado</text:h>
      <text:p text:style-name="Text_20_body">Exemplo:</text:p>
      <text:p text:style-name="P1"><text:soft-page-break/><text:span text:style-name="Source_20_Text">https://passosdigitalstore.com/produto/ebook-x?ref=AF123</text:span></text:p>
      <text:p text:style-name="Horizontal_20_Line"/>
      <text:h text:style-name="Heading_20_2" text:outline-level="2">Comissões</text:h>
      <text:p text:style-name="Preformatted_20_Text"><text:span text:style-name="Source_20_Text">Percentual configurável</text:span></text:p>
      <text:p text:style-name="Preformatted_20_Text"/>
      <text:p text:style-name="Preformatted_20_Text"><text:span text:style-name="Source_20_Text">5%</text:span></text:p>
      <text:p text:style-name="Preformatted_20_Text"><text:span text:style-name="Source_20_Text">10%</text:span></text:p>
      <text:p text:style-name="Preformatted_20_Text"><text:span text:style-name="Source_20_Text">20%</text:span></text:p>
      <text:p text:style-name="P1"><text:span text:style-name="Source_20_Text">30%</text:span></text:p>
      <text:p text:style-name="Horizontal_20_Line"/>
      <text:h text:style-name="Heading_20_2" text:outline-level="2">Dashboard Afiliado</text:h>
      <text:p text:style-name="Preformatted_20_Text"><text:span text:style-name="Source_20_Text">Cliques</text:span></text:p>
      <text:p text:style-name="Preformatted_20_Text"/>
      <text:p text:style-name="Preformatted_20_Text"><text:span text:style-name="Source_20_Text">Leads</text:span></text:p>
      <text:p text:style-name="Preformatted_20_Text"/>
      <text:p text:style-name="Preformatted_20_Text"><text:span text:style-name="Source_20_Text">Vendas</text:span></text:p>
      <text:p text:style-name="Preformatted_20_Text"/>
      <text:p text:style-name="Preformatted_20_Text"><text:span text:style-name="Source_20_Text">Comissões</text:span></text:p>
      <text:p text:style-name="Preformatted_20_Text"/>
      <text:p text:style-name="P1"><text:span text:style-name="Source_20_Text">Saques</text:span></text:p>
      <text:p text:style-name="Horizontal_20_Line"/>
      <text:h text:style-name="Heading_20_1" text:outline-level="1">RELATÓRIOS</text:h>
      <text:h text:style-name="Heading_20_2" text:outline-level="2">PDF</text:h>
      <text:p text:style-name="Text_20_body">Gerar:</text:p>
      <text:p text:style-name="Preformatted_20_Text"><text:span text:style-name="Source_20_Text">Receita</text:span></text:p>
      <text:p text:style-name="Preformatted_20_Text"/>
      <text:p text:style-name="Preformatted_20_Text"><text:span text:style-name="Source_20_Text">Vendas</text:span></text:p>
      <text:p text:style-name="Preformatted_20_Text"/>
      <text:p text:style-name="Preformatted_20_Text"><text:span text:style-name="Source_20_Text">Clientes</text:span></text:p>
      <text:p text:style-name="Preformatted_20_Text"/>
      <text:p text:style-name="P1"><text:span text:style-name="Source_20_Text">Produtos</text:span></text:p>
      <text:p text:style-name="Text_20_body">Biblioteca:</text:p>
      <text:p text:style-name="P1"><text:span text:style-name="Source_20_Text">PDFKit</text:span></text:p>
      <text:p text:style-name="Horizontal_20_Line"/>
      <text:h text:style-name="Heading_20_2" text:outline-level="2">Excel</text:h>
      <text:p text:style-name="Text_20_body">Biblioteca:</text:p>
      <text:p text:style-name="P1"><text:span text:style-name="Source_20_Text">ExcelJS</text:span></text:p>
      <text:p text:style-name="Text_20_body">Exportar:</text:p>
      <text:p text:style-name="Preformatted_20_Text"><text:soft-page-break/><text:span text:style-name="Source_20_Text">xlsx</text:span></text:p>
      <text:p text:style-name="P1"><text:span text:style-name="Source_20_Text">csv</text:span></text:p>
      <text:p text:style-name="Horizontal_20_Line"/>
      <text:h text:style-name="Heading_20_1" text:outline-level="1">SEGURANÇA</text:h>
      <text:h text:style-name="Heading_20_2" text:outline-level="2">Autenticação</text:h>
      <text:p text:style-name="Preformatted_20_Text"><text:span text:style-name="Source_20_Text">JWT</text:span></text:p>
      <text:p text:style-name="Preformatted_20_Text"/>
      <text:p text:style-name="Preformatted_20_Text"><text:span text:style-name="Source_20_Text">Refresh Token</text:span></text:p>
      <text:p text:style-name="Preformatted_20_Text"/>
      <text:p text:style-name="P1"><text:span text:style-name="Source_20_Text">RBAC</text:span></text:p>
      <text:p text:style-name="Text_20_body">Perfis:</text:p>
      <text:p text:style-name="Preformatted_20_Text"><text:span text:style-name="Source_20_Text">Administrador</text:span></text:p>
      <text:p text:style-name="Preformatted_20_Text"/>
      <text:p text:style-name="Preformatted_20_Text"><text:span text:style-name="Source_20_Text">Cliente</text:span></text:p>
      <text:p text:style-name="Preformatted_20_Text"/>
      <text:p text:style-name="P1"><text:span text:style-name="Source_20_Text">Afiliado</text:span></text:p>
      <text:p text:style-name="Horizontal_20_Line"/>
      <text:h text:style-name="Heading_20_2" text:outline-level="2">Senhas</text:h>
      <text:p text:style-name="P1"><text:span text:style-name="Source_20_Text">bcrypt</text:span></text:p>
      <text:p text:style-name="Text_20_body">Hash:</text:p>
      <text:p text:style-name="P1"><text:span text:style-name="Source_20_Text">bcrypt.hash(password, 12)</text:span></text:p>
      <text:p text:style-name="Horizontal_20_Line"/>
      <text:h text:style-name="Heading_20_2" text:outline-level="2">Proteções</text:h>
      <text:p text:style-name="Preformatted_20_Text"><text:span text:style-name="Source_20_Text">Helmet</text:span></text:p>
      <text:p text:style-name="Preformatted_20_Text"/>
      <text:p text:style-name="Preformatted_20_Text"><text:span text:style-name="Source_20_Text">Rate Limit</text:span></text:p>
      <text:p text:style-name="Preformatted_20_Text"/>
      <text:p text:style-name="Preformatted_20_Text"><text:span text:style-name="Source_20_Text">CSRF</text:span></text:p>
      <text:p text:style-name="Preformatted_20_Text"/>
      <text:p text:style-name="Preformatted_20_Text"><text:span text:style-name="Source_20_Text">XSS</text:span></text:p>
      <text:p text:style-name="Preformatted_20_Text"/>
      <text:p text:style-name="Preformatted_20_Text"><text:span text:style-name="Source_20_Text">SQL Injection</text:span></text:p>
      <text:p text:style-name="Preformatted_20_Text"/>
      <text:p text:style-name="Preformatted_20_Text"><text:span text:style-name="Source_20_Text">Captcha</text:span></text:p>
      <text:p text:style-name="Preformatted_20_Text"/>
      <text:p text:style-name="P1"><text:span text:style-name="Source_20_Text">Logs</text:span></text:p>
      <text:p text:style-name="Text_20_body">Bibliotecas:</text:p>
      <text:p text:style-name="Preformatted_20_Text"><text:span text:style-name="Source_20_Text">helmet</text:span></text:p>
      <text:p text:style-name="Preformatted_20_Text"><text:span text:style-name="Source_20_Text">express-rate-limit</text:span></text:p>
      <text:p text:style-name="Preformatted_20_Text"><text:span text:style-name="Source_20_Text">xss-clean</text:span></text:p>
      <text:p text:style-name="P1"><text:span text:style-name="Source_20_Text">cors</text:span></text:p>
      <text:p text:style-name="Horizontal_20_Line"><text:soft-page-break/></text:p>
      <text:h text:style-name="Heading_20_1" text:outline-level="1">BANCO DE DADOS (POSTGRESQL)</text:h>
      <text:h text:style-name="Heading_20_2" text:outline-level="2">Usuários</text:h>
      <text:p text:style-name="Preformatted_20_Text"><text:span text:style-name="Source_20_Text">CREATE TABLE usuarios (</text:span></text:p>
      <text:p text:style-name="Preformatted_20_Text"><text:span text:style-name="Source_20_Text"><text:s/>id UUID PRIMARY KEY,</text:span></text:p>
      <text:p text:style-name="Preformatted_20_Text"><text:span text:style-name="Source_20_Text"><text:s/>nome VARCHAR(255),</text:span></text:p>
      <text:p text:style-name="Preformatted_20_Text"><text:span text:style-name="Source_20_Text"><text:s/>email VARCHAR(255) UNIQUE,</text:span></text:p>
      <text:p text:style-name="Preformatted_20_Text"><text:span text:style-name="Source_20_Text"><text:s/>telefone VARCHAR(30),</text:span></text:p>
      <text:p text:style-name="Preformatted_20_Text"><text:span text:style-name="Source_20_Text"><text:s/>senha TEXT,</text:span></text:p>
      <text:p text:style-name="Preformatted_20_Text"><text:span text:style-name="Source_20_Text"><text:s/>perfil VARCHAR(20),</text:span></text:p>
      <text:p text:style-name="Preformatted_20_Text"><text:span text:style-name="Source_20_Text"><text:s/>created_at TIMESTAMP</text:span></text:p>
      <text:p text:style-name="P1"><text:span text:style-name="Source_20_Text">);</text:span></text:p>
      <text:p text:style-name="Horizontal_20_Line"/>
      <text:h text:style-name="Heading_20_2" text:outline-level="2">Produtos</text:h>
      <text:p text:style-name="Preformatted_20_Text"><text:span text:style-name="Source_20_Text">CREATE TABLE produtos (</text:span></text:p>
      <text:p text:style-name="Preformatted_20_Text"><text:span text:style-name="Source_20_Text"><text:s/>id UUID PRIMARY KEY,</text:span></text:p>
      <text:p text:style-name="Preformatted_20_Text"><text:span text:style-name="Source_20_Text"><text:s/>nome VARCHAR(255),</text:span></text:p>
      <text:p text:style-name="Preformatted_20_Text"><text:span text:style-name="Source_20_Text"><text:s/>descricao TEXT,</text:span></text:p>
      <text:p text:style-name="Preformatted_20_Text"><text:span text:style-name="Source_20_Text"><text:s/>valor NUMERIC(10,2),</text:span></text:p>
      <text:p text:style-name="Preformatted_20_Text"><text:span text:style-name="Source_20_Text"><text:s/>imagem TEXT,</text:span></text:p>
      <text:p text:style-name="Preformatted_20_Text"><text:span text:style-name="Source_20_Text"><text:s/>pdf TEXT,</text:span></text:p>
      <text:p text:style-name="Preformatted_20_Text"><text:span text:style-name="Source_20_Text"><text:s/>bonus TEXT,</text:span></text:p>
      <text:p text:style-name="Preformatted_20_Text"><text:span text:style-name="Source_20_Text"><text:s/>status BOOLEAN</text:span></text:p>
      <text:p text:style-name="P1"><text:span text:style-name="Source_20_Text">);</text:span></text:p>
      <text:p text:style-name="Horizontal_20_Line"/>
      <text:h text:style-name="Heading_20_2" text:outline-level="2">Vendas</text:h>
      <text:p text:style-name="Preformatted_20_Text"><text:span text:style-name="Source_20_Text">CREATE TABLE vendas (</text:span></text:p>
      <text:p text:style-name="Preformatted_20_Text"><text:span text:style-name="Source_20_Text"><text:s/>id UUID PRIMARY KEY,</text:span></text:p>
      <text:p text:style-name="Preformatted_20_Text"><text:span text:style-name="Source_20_Text"><text:s/>usuario_id UUID,</text:span></text:p>
      <text:p text:style-name="Preformatted_20_Text"><text:span text:style-name="Source_20_Text"><text:s/>produto_id UUID,</text:span></text:p>
      <text:p text:style-name="Preformatted_20_Text"><text:span text:style-name="Source_20_Text"><text:s/>valor NUMERIC(10,2),</text:span></text:p>
      <text:p text:style-name="Preformatted_20_Text"><text:span text:style-name="Source_20_Text"><text:s/>status VARCHAR(50),</text:span></text:p>
      <text:p text:style-name="Preformatted_20_Text"><text:span text:style-name="Source_20_Text"><text:s/>pagamento_id VARCHAR(100),</text:span></text:p>
      <text:p text:style-name="Preformatted_20_Text"><text:span text:style-name="Source_20_Text"><text:s/>created_at TIMESTAMP</text:span></text:p>
      <text:p text:style-name="P1"><text:span text:style-name="Source_20_Text">);</text:span></text:p>
      <text:p text:style-name="Horizontal_20_Line"/>
      <text:h text:style-name="Heading_20_2" text:outline-level="2">Afiliados</text:h>
      <text:p text:style-name="Preformatted_20_Text"><text:span text:style-name="Source_20_Text">CREATE TABLE afiliados (</text:span></text:p>
      <text:p text:style-name="Preformatted_20_Text"><text:span text:style-name="Source_20_Text"><text:s/>id UUID PRIMARY KEY,</text:span></text:p>
      <text:p text:style-name="Preformatted_20_Text"><text:span text:style-name="Source_20_Text"><text:s/>usuario_id UUID,</text:span></text:p>
      <text:p text:style-name="Preformatted_20_Text"><text:span text:style-name="Source_20_Text"><text:s/>comissao NUMERIC(5,2)</text:span></text:p>
      <text:p text:style-name="P1"><text:span text:style-name="Source_20_Text">);</text:span></text:p>
      <text:p text:style-name="Horizontal_20_Line"/>
      <text:h text:style-name="Heading_20_2" text:outline-level="2"><text:soft-page-break/>Comissões</text:h>
      <text:p text:style-name="Preformatted_20_Text"><text:span text:style-name="Source_20_Text">CREATE TABLE comissoes (</text:span></text:p>
      <text:p text:style-name="Preformatted_20_Text"><text:span text:style-name="Source_20_Text"><text:s/>id UUID PRIMARY KEY,</text:span></text:p>
      <text:p text:style-name="Preformatted_20_Text"><text:span text:style-name="Source_20_Text"><text:s/>afiliado_id UUID,</text:span></text:p>
      <text:p text:style-name="Preformatted_20_Text"><text:span text:style-name="Source_20_Text"><text:s/>venda_id UUID,</text:span></text:p>
      <text:p text:style-name="Preformatted_20_Text"><text:span text:style-name="Source_20_Text"><text:s/>valor NUMERIC(10,2),</text:span></text:p>
      <text:p text:style-name="Preformatted_20_Text"><text:span text:style-name="Source_20_Text"><text:s/>status VARCHAR(20)</text:span></text:p>
      <text:p text:style-name="P1"><text:span text:style-name="Source_20_Text">);</text:span></text:p>
      <text:p text:style-name="Horizontal_20_Line"/>
      <text:h text:style-name="Heading_20_1" text:outline-level="1">ESTRUTURA DE PASTAS</text:h>
      <text:p text:style-name="Preformatted_20_Text"><text:span text:style-name="Source_20_Text">passos-digital-store</text:span></text:p>
      <text:p text:style-name="Preformatted_20_Text"/>
      <text:p text:style-name="Preformatted_20_Text"><text:span text:style-name="Source_20_Text">frontend</text:span></text:p>
      <text:p text:style-name="Preformatted_20_Text"><text:span text:style-name="Source_20_Text">│</text:span></text:p>
      <text:p text:style-name="Preformatted_20_Text"><text:span text:style-name="Source_20_Text">├── app</text:span></text:p>
      <text:p text:style-name="Preformatted_20_Text"><text:span text:style-name="Source_20_Text">├── components</text:span></text:p>
      <text:p text:style-name="Preformatted_20_Text"><text:span text:style-name="Source_20_Text">├── hooks</text:span></text:p>
      <text:p text:style-name="Preformatted_20_Text"><text:span text:style-name="Source_20_Text">├── services</text:span></text:p>
      <text:p text:style-name="Preformatted_20_Text"><text:span text:style-name="Source_20_Text">├── styles</text:span></text:p>
      <text:p text:style-name="Preformatted_20_Text"><text:span text:style-name="Source_20_Text">└── public</text:span></text:p>
      <text:p text:style-name="Preformatted_20_Text"/>
      <text:p text:style-name="Preformatted_20_Text"><text:span text:style-name="Source_20_Text">backend</text:span></text:p>
      <text:p text:style-name="Preformatted_20_Text"><text:span text:style-name="Source_20_Text">│</text:span></text:p>
      <text:p text:style-name="Preformatted_20_Text"><text:span text:style-name="Source_20_Text">├── src</text:span></text:p>
      <text:p text:style-name="Preformatted_20_Text"><text:span text:style-name="Source_20_Text">│ <text:s text:c="2"/>├── controllers</text:span></text:p>
      <text:p text:style-name="Preformatted_20_Text"><text:span text:style-name="Source_20_Text">│ <text:s text:c="2"/>├── services</text:span></text:p>
      <text:p text:style-name="Preformatted_20_Text"><text:span text:style-name="Source_20_Text">│ <text:s text:c="2"/>├── routes</text:span></text:p>
      <text:p text:style-name="Preformatted_20_Text"><text:span text:style-name="Source_20_Text">│ <text:s text:c="2"/>├── middlewares</text:span></text:p>
      <text:p text:style-name="Preformatted_20_Text"><text:span text:style-name="Source_20_Text">│ <text:s text:c="2"/>├── webhooks</text:span></text:p>
      <text:p text:style-name="Preformatted_20_Text"><text:span text:style-name="Source_20_Text">│ <text:s text:c="2"/>├── jobs</text:span></text:p>
      <text:p text:style-name="Preformatted_20_Text"><text:span text:style-name="Source_20_Text">│ <text:s text:c="2"/>├── utils</text:span></text:p>
      <text:p text:style-name="Preformatted_20_Text"><text:span text:style-name="Source_20_Text">│ <text:s text:c="2"/>└── database</text:span></text:p>
      <text:p text:style-name="Preformatted_20_Text"><text:span text:style-name="Source_20_Text">│</text:span></text:p>
      <text:p text:style-name="P1"><text:span text:style-name="Source_20_Text">└── uploads</text:span></text:p>
      <text:p text:style-name="Horizontal_20_Line"/>
      <text:h text:style-name="Heading_20_1" text:outline-level="1">DOCKER</text:h>
      <text:p text:style-name="Preformatted_20_Text"><text:span text:style-name="Source_20_Text">services:</text:span></text:p>
      <text:p text:style-name="Preformatted_20_Text"/>
      <text:p text:style-name="Preformatted_20_Text"><text:span text:style-name="Source_20_Text"><text:s text:c="2"/>postgres:</text:span></text:p>
      <text:p text:style-name="Preformatted_20_Text"><text:span text:style-name="Source_20_Text"><text:s text:c="4"/>image: postgres:16</text:span></text:p>
      <text:p text:style-name="Preformatted_20_Text"/>
      <text:p text:style-name="Preformatted_20_Text"><text:span text:style-name="Source_20_Text"><text:s text:c="2"/>backend:</text:span></text:p>
      <text:p text:style-name="Preformatted_20_Text"><text:span text:style-name="Source_20_Text"><text:s text:c="4"/>build: ./backend</text:span></text:p>
      <text:p text:style-name="Preformatted_20_Text"/>
      <text:p text:style-name="Preformatted_20_Text"><text:span text:style-name="Source_20_Text"><text:s text:c="2"/>frontend:</text:span></text:p>
      <text:p text:style-name="Preformatted_20_Text"><text:span text:style-name="Source_20_Text"><text:s text:c="4"/>build: ./frontend</text:span></text:p>
      <text:p text:style-name="Preformatted_20_Text"/>
      <text:p text:style-name="Preformatted_20_Text"><text:span text:style-name="Source_20_Text"><text:s text:c="2"/>nginx:</text:span></text:p>
      <text:p text:style-name="P1"><text:span text:style-name="Source_20_Text"><text:s text:c="4"/>image: nginx</text:span></text:p>
      <text:p text:style-name="Horizontal_20_Line"/>
      <text:h text:style-name="Heading_20_1" text:outline-level="1"><text:soft-page-break/>ROADMAP FUTURO</text:h>
      <text:h text:style-name="Heading_20_3" text:outline-level="3">Fase 2</text:h>
      <text:list text:style-name="L3">
        <text:list-item>
          <text:p text:style-name="P6">Área de membros</text:p>
        </text:list-item>
        <text:list-item>
          <text:p text:style-name="P6">Vídeo aulas</text:p>
        </text:list-item>
        <text:list-item>
          <text:p text:style-name="P6">Controle de progresso</text:p>
        </text:list-item>
        <text:list-item>
          <text:p text:style-name="P6">Certificados PDF</text:p>
        </text:list-item>
      </text:list>
      <text:h text:style-name="Heading_20_3" text:outline-level="3">Fase 3</text:h>
      <text:list text:style-name="L4">
        <text:list-item>
          <text:p text:style-name="P7">Assinaturas mensais</text:p>
        </text:list-item>
        <text:list-item>
          <text:p text:style-name="P7">Clube de conteúdos</text:p>
        </text:list-item>
        <text:list-item>
          <text:p text:style-name="P7">Comunidade exclusiva</text:p>
        </text:list-item>
      </text:list>
      <text:h text:style-name="Heading_20_3" text:outline-level="3">Fase 4</text:h>
      <text:list text:style-name="L5">
        <text:list-item>
          <text:p text:style-name="P8">Aplicativo Android</text:p>
        </text:list-item>
        <text:list-item>
          <text:p text:style-name="P8">Aplicativo iOS</text:p>
        </text:list-item>
        <text:list-item>
          <text:p text:style-name="P8">Notificações Push</text:p>
        </text:list-item>
      </text:list>
      <text:h text:style-name="Heading_20_3" text:outline-level="3">Fase 5</text:h>
      <text:list text:style-name="L6">
        <text:list-item>
          <text:p text:style-name="P9">IA para atendimento automático</text:p>
        </text:list-item>
        <text:list-item>
          <text:p text:style-name="P9">Funil de vendas integrado</text:p>
        </text:list-item>
        <text:list-item>
          <text:p text:style-name="P9">CRM próprio</text:p>
        </text:list-item>
        <text:list-item>
          <text:p text:style-name="P9">Marketplace de afiliados</text:p>
        </text:list-item>
      </text:list>
      <text:h text:style-name="Heading_20_1" text:outline-level="1">MVP Recomendado</text:h>
      <text:p text:style-name="Text_20_body">Para lançar rapidamente, desenvolva primeiro:</text:p>
      <text:list text:style-name="L7">
        <text:list-item>
          <text:p text:style-name="P10">Landing Page</text:p>
        </text:list-item>
        <text:list-item>
          <text:p text:style-name="P10">Cadastro de Produtos</text:p>
        </text:list-item>
        <text:list-item>
          <text:p text:style-name="P10">Mercado Pago Checkout Pro</text:p>
        </text:list-item>
        <text:list-item>
          <text:p text:style-name="P10">Webhook</text:p>
        </text:list-item>
        <text:list-item>
          <text:p text:style-name="P10">Entrega automática por WhatsApp</text:p>
        </text:list-item>
        <text:list-item>
          <text:p text:style-name="P10">Entrega automática por E-mail</text:p>
        </text:list-item>
        <text:list-item>
          <text:p text:style-name="P10">Área do Cliente</text:p>
        </text:list-item>
        <text:list-item>
          <text:p text:style-name="P10">Dashboard Administrativo</text:p>
        </text:list-item>
      </text:list>
      <text:p text:style-name="Text_20_body"><text:soft-page-break/>Com esse MVP, a PASSOS DIGITAL STORE já consegue vender e entregar e-books 100% automaticamente, sem intervenção manual do administrador.</text:p>
      <text:p text:style-name="Text_20_body">Excelente. Com essa <text:span text:style-name="Strong_20_Emphasis">Etapa 2</text:span>, o projeto deixa de ser apenas uma base estrutural e passa a operar como um backend real para o MVP.</text:p>
      <text:h text:style-name="Heading_20_2" text:outline-level="2">Escopo da Etapa 2</text:h>
      <text:h text:style-name="Heading_20_3" text:outline-level="3">1. Autenticação JWT</text:h>
      <text:p text:style-name="Text_20_body">Implementar:</text:p>
      <text:list text:style-name="L8">
        <text:list-item>
          <text:p text:style-name="P12">Login via email/senha </text:p>
        </text:list-item>
        <text:list-item>
          <text:p text:style-name="P12">Access Token JWT </text:p>
        </text:list-item>
        <text:list-item>
          <text:p text:style-name="P12">Refresh Token </text:p>
        </text:list-item>
        <text:list-item>
          <text:p text:style-name="P12">Logout </text:p>
        </text:list-item>
        <text:list-item>
          <text:p text:style-name="P11">Renovação de sessão </text:p>
        </text:list-item>
      </text:list>
      <text:p text:style-name="Text_20_body">Estrutura:</text:p>
      <text:section text:style-name="Sect1" text:name="code-block-viewer">
        <text:p text:style-name="P2"><text:span text:style-name="Source_20_Text">POST /auth/login</text:span></text:p>
        <text:p text:style-name="Preformatted_20_Text"><text:span text:style-name="Source_20_Text">POST /auth/refresh</text:span></text:p>
        <text:p text:style-name="Preformatted_20_Text"><text:span text:style-name="Source_20_Text">POST /auth/logout</text:span></text:p>
        <text:p text:style-name="P1"><text:span text:style-name="Source_20_Text">GET <text:s/>/auth/me</text:span></text:p>
      </text:section>
      <text:p text:style-name="Horizontal_20_Line"/>
      <text:h text:style-name="Heading_20_3" text:outline-level="3">2. Login Administrativo</text:h>
      <text:p text:style-name="Text_20_body">Perfis:</text:p>
      <text:section text:style-name="Sect1" text:name="Seção1">
        <text:p text:style-name="P2"><text:bookmark text:name="code-block-viewer"/><text:span text:style-name="Source_20_Text">SUPER_ADMIN</text:span></text:p>
        <text:p text:style-name="Preformatted_20_Text"><text:span text:style-name="Source_20_Text">ADMIN</text:span></text:p>
        <text:p text:style-name="Preformatted_20_Text"><text:span text:style-name="Source_20_Text">EDITOR</text:span></text:p>
        <text:p text:style-name="P1"><text:span text:style-name="Source_20_Text">CLIENTE</text:span></text:p>
      </text:section>
      <text:p text:style-name="Text_20_body">Tabela:</text:p>
      <text:section text:style-name="Sect1" text:name="Seção2">
        <text:p text:style-name="P2"><text:bookmark text:name="code-block-viewer Copia 1"/><text:span text:style-name="Source_20_Text">users</text:span></text:p>
        <text:p text:style-name="Preformatted_20_Text"><text:span text:style-name="Source_20_Text">- id</text:span></text:p>
        <text:p text:style-name="Preformatted_20_Text"><text:span text:style-name="Source_20_Text">- name</text:span></text:p>
        <text:p text:style-name="Preformatted_20_Text"><text:span text:style-name="Source_20_Text">- email</text:span></text:p>
        <text:p text:style-name="Preformatted_20_Text"><text:span text:style-name="Source_20_Text">- password_hash</text:span></text:p>
        <text:p text:style-name="Preformatted_20_Text"><text:span text:style-name="Source_20_Text">- role</text:span></text:p>
        <text:p text:style-name="Preformatted_20_Text"><text:span text:style-name="Source_20_Text">- active</text:span></text:p>
        <text:p text:style-name="P1"><text:span text:style-name="Source_20_Text">- created_at</text:span></text:p>
      </text:section>
      <text:p text:style-name="Horizontal_20_Line"/>
      <text:h text:style-name="Heading_20_3" text:outline-level="3">3. Recuperação de Senha</text:h>
      <text:p text:style-name="Text_20_body">Fluxo:</text:p>
      <text:section text:style-name="Sect1" text:name="Seção3">
        <text:p text:style-name="P2"><text:bookmark text:name="code-block-viewer Copia 2"/><text:span text:style-name="Source_20_Text">Usuário solicita recuperação</text:span></text:p>
        <text:p text:style-name="Preformatted_20_Text"><text:span text:style-name="Source_20_Text">↓</text:span></text:p>
        <text:p text:style-name="Preformatted_20_Text"><text:span text:style-name="Source_20_Text">Sistema gera token</text:span></text:p>
        <text:p text:style-name="Preformatted_20_Text"><text:span text:style-name="Source_20_Text">↓</text:span></text:p>
        <text:p text:style-name="Preformatted_20_Text"><text:span text:style-name="Source_20_Text">Envia email</text:span></text:p>
        <text:p text:style-name="Preformatted_20_Text"><text:soft-page-break/><text:span text:style-name="Source_20_Text">↓</text:span></text:p>
        <text:p text:style-name="P1"><text:span text:style-name="Source_20_Text">Usuário redefine senha</text:span></text:p>
      </text:section>
      <text:p text:style-name="Text_20_body">Endpoints:</text:p>
      <text:section text:style-name="Sect1" text:name="Seção4">
        <text:p text:style-name="P2"><text:bookmark text:name="code-block-viewer Copia 3"/><text:span text:style-name="Source_20_Text">POST /auth/forgot-password</text:span></text:p>
        <text:p text:style-name="P1"><text:span text:style-name="Source_20_Text">POST /auth/reset-password</text:span></text:p>
      </text:section>
      <text:p text:style-name="Text_20_body">Tabela:</text:p>
      <text:section text:style-name="Sect1" text:name="Seção5">
        <text:p text:style-name="P2"><text:bookmark text:name="code-block-viewer Copia 4"/><text:span text:style-name="Source_20_Text">password_resets</text:span></text:p>
        <text:p text:style-name="Preformatted_20_Text"><text:span text:style-name="Source_20_Text">- id</text:span></text:p>
        <text:p text:style-name="Preformatted_20_Text"><text:span text:style-name="Source_20_Text">- user_id</text:span></text:p>
        <text:p text:style-name="Preformatted_20_Text"><text:span text:style-name="Source_20_Text">- token</text:span></text:p>
        <text:p text:style-name="P1"><text:span text:style-name="Source_20_Text">- expires_at</text:span></text:p>
      </text:section>
      <text:p text:style-name="Horizontal_20_Line"/>
      <text:h text:style-name="Heading_20_3" text:outline-level="3">4. CRUD Completo de Produtos</text:h>
      <text:p text:style-name="Text_20_body">Entidade principal do MVP.</text:p>
      <text:p text:style-name="Text_20_body">Tabela:</text:p>
      <text:section text:style-name="Sect1" text:name="Seção6">
        <text:p text:style-name="P2"><text:bookmark text:name="code-block-viewer Copia 5"/><text:span text:style-name="Source_20_Text">products</text:span></text:p>
        <text:p text:style-name="Preformatted_20_Text"><text:span text:style-name="Source_20_Text">- id</text:span></text:p>
        <text:p text:style-name="Preformatted_20_Text"><text:span text:style-name="Source_20_Text">- code</text:span></text:p>
        <text:p text:style-name="Preformatted_20_Text"><text:span text:style-name="Source_20_Text">- name</text:span></text:p>
        <text:p text:style-name="Preformatted_20_Text"><text:span text:style-name="Source_20_Text">- description</text:span></text:p>
        <text:p text:style-name="Preformatted_20_Text"><text:span text:style-name="Source_20_Text">- category</text:span></text:p>
        <text:p text:style-name="Preformatted_20_Text"><text:span text:style-name="Source_20_Text">- pdf_url</text:span></text:p>
        <text:p text:style-name="Preformatted_20_Text"><text:span text:style-name="Source_20_Text">- image_url</text:span></text:p>
        <text:p text:style-name="Preformatted_20_Text"><text:span text:style-name="Source_20_Text">- active</text:span></text:p>
        <text:p text:style-name="Preformatted_20_Text"><text:span text:style-name="Source_20_Text">- created_at</text:span></text:p>
        <text:p text:style-name="P1"><text:span text:style-name="Source_20_Text">- updated_at</text:span></text:p>
      </text:section>
      <text:p text:style-name="Text_20_body">Endpoints:</text:p>
      <text:section text:style-name="Sect1" text:name="Seção7">
        <text:p text:style-name="P2"><text:bookmark text:name="code-block-viewer Copia 6"/><text:span text:style-name="Source_20_Text">POST <text:s text:c="2"/>/products</text:span></text:p>
        <text:p text:style-name="Preformatted_20_Text"><text:span text:style-name="Source_20_Text">GET <text:s text:c="3"/>/products</text:span></text:p>
        <text:p text:style-name="Preformatted_20_Text"><text:span text:style-name="Source_20_Text">GET <text:s text:c="3"/>/products/:id</text:span></text:p>
        <text:p text:style-name="Preformatted_20_Text"><text:span text:style-name="Source_20_Text">PUT <text:s text:c="3"/>/products/:id</text:span></text:p>
        <text:p text:style-name="P1"><text:span text:style-name="Source_20_Text">DELETE /products/:id</text:span></text:p>
      </text:section>
      <text:p text:style-name="Text_20_body">Filtros:</text:p>
      <text:section text:style-name="Sect1" text:name="Seção8">
        <text:p text:style-name="P2"><text:bookmark text:name="code-block-viewer Copia 7"/><text:span text:style-name="Source_20_Text">?name=</text:span></text:p>
        <text:p text:style-name="Preformatted_20_Text"><text:span text:style-name="Source_20_Text">?category=</text:span></text:p>
        <text:p text:style-name="Preformatted_20_Text"><text:span text:style-name="Source_20_Text">?active=</text:span></text:p>
        <text:p text:style-name="Preformatted_20_Text"><text:span text:style-name="Source_20_Text">?page=</text:span></text:p>
        <text:p text:style-name="P1"><text:span text:style-name="Source_20_Text">?limit=</text:span></text:p>
      </text:section>
      <text:p text:style-name="Horizontal_20_Line"/>
      <text:h text:style-name="Heading_20_3" text:outline-level="3">5. Upload de PDFs</text:h>
      <text:p text:style-name="Text_20_body">Objetivo:</text:p>
      <text:section text:style-name="Sect1" text:name="Seção9">
        <text:p text:style-name="P2"><text:bookmark text:name="code-block-viewer Copia 8"/><text:span text:style-name="Source_20_Text">Catálogos</text:span></text:p>
        <text:p text:style-name="Preformatted_20_Text"><text:span text:style-name="Source_20_Text">Manuais</text:span></text:p>
        <text:p text:style-name="P1"><text:span text:style-name="Source_20_Text">Fichas técnicas</text:span></text:p>
      </text:section>
      <text:p text:style-name="Text_20_body"><text:soft-page-break/>Storage:</text:p>
      <text:section text:style-name="Sect1" text:name="Seção10">
        <text:p text:style-name="P3"><text:bookmark text:name="code-block-viewer Copia 9"/><text:span text:style-name="Source_20_Text">uploads/pdfs/</text:span></text:p>
      </text:section>
      <text:p text:style-name="Text_20_body">Endpoint:</text:p>
      <text:section text:style-name="Sect1" text:name="Seção11">
        <text:p text:style-name="P3"><text:bookmark text:name="code-block-viewer Copia 10"/><text:span text:style-name="Source_20_Text">POST /upload/pdf</text:span></text:p>
      </text:section>
      <text:p text:style-name="Text_20_body">Validações:</text:p>
      <text:section text:style-name="Sect1" text:name="Seção12">
        <text:p text:style-name="P2"><text:bookmark text:name="code-block-viewer Copia 11"/><text:span text:style-name="Source_20_Text">Máx 20MB</text:span></text:p>
        <text:p text:style-name="P1"><text:span text:style-name="Source_20_Text">Somente PDF</text:span></text:p>
      </text:section>
      <text:p text:style-name="Horizontal_20_Line"/>
      <text:h text:style-name="Heading_20_3" text:outline-level="3">6. Upload de Imagens</text:h>
      <text:p text:style-name="Text_20_body">Storage:</text:p>
      <text:section text:style-name="Sect1" text:name="Seção13">
        <text:p text:style-name="P3"><text:bookmark text:name="code-block-viewer Copia 12"/><text:span text:style-name="Source_20_Text">uploads/images/</text:span></text:p>
      </text:section>
      <text:p text:style-name="Text_20_body">Formatos:</text:p>
      <text:section text:style-name="Sect1" text:name="Seção14">
        <text:p text:style-name="P2"><text:bookmark text:name="code-block-viewer Copia 13"/><text:span text:style-name="Source_20_Text">jpg</text:span></text:p>
        <text:p text:style-name="Preformatted_20_Text"><text:span text:style-name="Source_20_Text">jpeg</text:span></text:p>
        <text:p text:style-name="Preformatted_20_Text"><text:span text:style-name="Source_20_Text">png</text:span></text:p>
        <text:p text:style-name="P1"><text:span text:style-name="Source_20_Text">webp</text:span></text:p>
      </text:section>
      <text:p text:style-name="Text_20_body">Endpoint:</text:p>
      <text:section text:style-name="Sect1" text:name="Seção15">
        <text:p text:style-name="P3"><text:bookmark text:name="code-block-viewer Copia 14"/><text:span text:style-name="Source_20_Text">POST /upload/image</text:span></text:p>
      </text:section>
      <text:p text:style-name="Text_20_body">Validações:</text:p>
      <text:section text:style-name="Sect1" text:name="Seção16">
        <text:p text:style-name="P2"><text:bookmark text:name="code-block-viewer Copia 15"/><text:span text:style-name="Source_20_Text">Máx 5MB</text:span></text:p>
        <text:p text:style-name="Preformatted_20_Text"><text:span text:style-name="Source_20_Text">Compressão automática</text:span></text:p>
        <text:p text:style-name="P1"><text:span text:style-name="Source_20_Text">Thumbnail opcional</text:span></text:p>
      </text:section>
      <text:p text:style-name="Horizontal_20_Line"/>
      <text:h text:style-name="Heading_20_3" text:outline-level="3">7. Dashboard Administrativo</text:h>
      <text:p text:style-name="Text_20_body">Endpoints para métricas.</text:p>
      <text:p text:style-name="Text_20_body">Exemplos:</text:p>
      <text:section text:style-name="Sect1" text:name="Seção17">
        <text:p text:style-name="P3"><text:bookmark text:name="code-block-viewer Copia 16"/><text:span text:style-name="Source_20_Text">GET /dashboard/summary</text:span></text:p>
      </text:section>
      <text:p text:style-name="Text_20_body">Retorno:</text:p>
      <text:section text:style-name="Sect1" text:name="Seção18">
        <text:p text:style-name="P2"><text:bookmark text:name="code-block-viewer Copia 17"/><text:span text:style-name="Source_20_Text">{</text:span></text:p>
        <text:p text:style-name="Preformatted_20_Text"><text:span text:style-name="Source_20_Text"><text:s text:c="2"/>"users": 120,</text:span></text:p>
        <text:p text:style-name="Preformatted_20_Text"><text:span text:style-name="Source_20_Text"><text:s text:c="2"/>"products": 450,</text:span></text:p>
        <text:p text:style-name="Preformatted_20_Text"><text:span text:style-name="Source_20_Text"><text:s text:c="2"/>"uploads": 820,</text:span></text:p>
        <text:p text:style-name="Preformatted_20_Text"><text:span text:style-name="Source_20_Text"><text:s text:c="2"/>"activeProducts": 420</text:span></text:p>
        <text:p text:style-name="P1"><text:span text:style-name="Source_20_Text">}</text:span></text:p>
      </text:section>
      <text:p text:style-name="Horizontal_20_Line"/>
      <text:h text:style-name="Heading_20_3" text:outline-level="3"><text:soft-page-break/>8. Relatórios</text:h>
      <text:p text:style-name="Text_20_body">Relatórios iniciais:</text:p>
      <text:h text:style-name="Heading_20_4" text:outline-level="4">Produtos</text:h>
      <text:section text:style-name="Sect1" text:name="Seção19">
        <text:p text:style-name="P2"><text:bookmark text:name="code-block-viewer Copia 18"/><text:span text:style-name="Source_20_Text">Produtos cadastrados</text:span></text:p>
        <text:p text:style-name="Preformatted_20_Text"><text:span text:style-name="Source_20_Text">Produtos ativos</text:span></text:p>
        <text:p text:style-name="P1"><text:span text:style-name="Source_20_Text">Produtos por categoria</text:span></text:p>
      </text:section>
      <text:h text:style-name="Heading_20_4" text:outline-level="4">Usuários</text:h>
      <text:section text:style-name="Sect1" text:name="Seção20">
        <text:p text:style-name="P2"><text:bookmark text:name="code-block-viewer Copia 19"/><text:span text:style-name="Source_20_Text">Novos usuários</text:span></text:p>
        <text:p text:style-name="Preformatted_20_Text"><text:span text:style-name="Source_20_Text">Usuários ativos</text:span></text:p>
        <text:p text:style-name="P1"><text:span text:style-name="Source_20_Text">Admins</text:span></text:p>
      </text:section>
      <text:p text:style-name="Text_20_body">Exportação:</text:p>
      <text:section text:style-name="Sect1" text:name="Seção21">
        <text:p text:style-name="P2"><text:bookmark text:name="code-block-viewer Copia 20"/><text:span text:style-name="Source_20_Text">PDF</text:span></text:p>
        <text:p text:style-name="Preformatted_20_Text"><text:span text:style-name="Source_20_Text">Excel</text:span></text:p>
        <text:p text:style-name="P1"><text:span text:style-name="Source_20_Text">CSV</text:span></text:p>
      </text:section>
      <text:p text:style-name="Text_20_body">Endpoints:</text:p>
      <text:section text:style-name="Sect1" text:name="Seção22">
        <text:p text:style-name="P2"><text:bookmark text:name="code-block-viewer Copia 21"/><text:span text:style-name="Source_20_Text">GET /reports/products</text:span></text:p>
        <text:p text:style-name="P1"><text:span text:style-name="Source_20_Text">GET /reports/users</text:span></text:p>
      </text:section>
      <text:p text:style-name="Horizontal_20_Line"/>
      <text:h text:style-name="Heading_20_3" text:outline-level="3">9. RBAC (Role Based Access Control)</text:h>
      <text:p text:style-name="Text_20_body">Middleware de permissões.</text:p>
      <text:p text:style-name="Text_20_body">Exemplo:</text:p>
      <text:section text:style-name="Sect1" text:name="Seção23">
        <text:p text:style-name="P2"><text:bookmark text:name="code-block-viewer Copia 22"/><text:span text:style-name="Source_20_Text">SUPER_ADMIN</text:span></text:p>
        <text:p text:style-name="Preformatted_20_Text"><text:span text:style-name="Source_20_Text">├── tudo</text:span></text:p>
        <text:p text:style-name="Preformatted_20_Text"><text:span text:style-name="Source_20_Text">ADMIN</text:span></text:p>
        <text:p text:style-name="Preformatted_20_Text"><text:span text:style-name="Source_20_Text">├── produtos</text:span></text:p>
        <text:p text:style-name="Preformatted_20_Text"><text:span text:style-name="Source_20_Text">├── uploads</text:span></text:p>
        <text:p text:style-name="Preformatted_20_Text"><text:span text:style-name="Source_20_Text">├── relatórios</text:span></text:p>
        <text:p text:style-name="Preformatted_20_Text"><text:span text:style-name="Source_20_Text">EDITOR</text:span></text:p>
        <text:p text:style-name="Preformatted_20_Text"><text:span text:style-name="Source_20_Text">├── produtos</text:span></text:p>
        <text:p text:style-name="Preformatted_20_Text"><text:span text:style-name="Source_20_Text">CLIENTE</text:span></text:p>
        <text:p text:style-name="P1"><text:span text:style-name="Source_20_Text">├── leitura</text:span></text:p>
      </text:section>
      <text:p text:style-name="Text_20_body">Middleware:</text:p>
      <text:section text:style-name="Sect1" text:name="Seção24">
        <text:p text:style-name="P2"><text:bookmark text:name="code-block-viewer Copia 23"/><text:span text:style-name="Source_20_Text">@Roles("ADMIN")</text:span></text:p>
        <text:p text:style-name="P1"><text:span text:style-name="Source_20_Text">@Roles("SUPER_ADMIN")</text:span></text:p>
      </text:section>
      <text:p text:style-name="Text_20_body">ou</text:p>
      <text:section text:style-name="Sect1" text:name="Seção25">
        <text:p text:style-name="P3"><text:bookmark text:name="code-block-viewer Copia 24"/><text:span text:style-name="Source_20_Text">authorize(["ADMIN"])</text:span></text:p>
      </text:section>
      <text:p text:style-name="Horizontal_20_Line"/>
      <text:h text:style-name="Heading_20_3" text:outline-level="3">10. Logs de Auditoria</text:h>
      <text:p text:style-name="Text_20_body">Registrar toda ação crítica.</text:p>
      <text:p text:style-name="Text_20_body"><text:soft-page-break/>Tabela:</text:p>
      <text:section text:style-name="Sect1" text:name="Seção26">
        <text:p text:style-name="P2"><text:bookmark text:name="code-block-viewer Copia 25"/><text:span text:style-name="Source_20_Text">audit_logs</text:span></text:p>
        <text:p text:style-name="Preformatted_20_Text"><text:span text:style-name="Source_20_Text">- id</text:span></text:p>
        <text:p text:style-name="Preformatted_20_Text"><text:span text:style-name="Source_20_Text">- user_id</text:span></text:p>
        <text:p text:style-name="Preformatted_20_Text"><text:span text:style-name="Source_20_Text">- action</text:span></text:p>
        <text:p text:style-name="Preformatted_20_Text"><text:span text:style-name="Source_20_Text">- entity</text:span></text:p>
        <text:p text:style-name="Preformatted_20_Text"><text:span text:style-name="Source_20_Text">- entity_id</text:span></text:p>
        <text:p text:style-name="Preformatted_20_Text"><text:span text:style-name="Source_20_Text">- old_data</text:span></text:p>
        <text:p text:style-name="Preformatted_20_Text"><text:span text:style-name="Source_20_Text">- new_data</text:span></text:p>
        <text:p text:style-name="Preformatted_20_Text"><text:span text:style-name="Source_20_Text">- ip</text:span></text:p>
        <text:p text:style-name="P1"><text:span text:style-name="Source_20_Text">- created_at</text:span></text:p>
      </text:section>
      <text:p text:style-name="Text_20_body">Exemplos:</text:p>
      <text:section text:style-name="Sect1" text:name="Seção27">
        <text:p text:style-name="P2"><text:bookmark text:name="code-block-viewer Copia 26"/><text:span text:style-name="Source_20_Text">CREATE_PRODUCT</text:span></text:p>
        <text:p text:style-name="Preformatted_20_Text"><text:span text:style-name="Source_20_Text">UPDATE_PRODUCT</text:span></text:p>
        <text:p text:style-name="Preformatted_20_Text"><text:span text:style-name="Source_20_Text">DELETE_PRODUCT</text:span></text:p>
        <text:p text:style-name="Preformatted_20_Text"><text:span text:style-name="Source_20_Text">LOGIN</text:span></text:p>
        <text:p text:style-name="P1"><text:span text:style-name="Source_20_Text">RESET_PASSWORD</text:span></text:p>
      </text:section>
      <text:p text:style-name="Horizontal_20_Line"/>
      <text:h text:style-name="Heading_20_3" text:outline-level="3">11. Preparação para Mercado Pago</text:h>
      <text:p text:style-name="Text_20_body">Ainda sem cobrança ativa.</text:p>
      <text:p text:style-name="Text_20_body">Criar módulo desacoplado:</text:p>
      <text:section text:style-name="Sect1" text:name="Seção28">
        <text:p text:style-name="P2"><text:bookmark text:name="code-block-viewer Copia 27"/><text:span text:style-name="Source_20_Text">modules/</text:span></text:p>
        <text:p text:style-name="Preformatted_20_Text"><text:span text:style-name="Source_20_Text"><text:s/>└─ payments/</text:span></text:p>
        <text:p text:style-name="P1"><text:span text:style-name="Source_20_Text"><text:s text:c="5"/>└─ mercadopago/</text:span></text:p>
      </text:section>
      <text:p text:style-name="Text_20_body">Interfaces:</text:p>
      <text:section text:style-name="Sect1" text:name="Seção29">
        <text:p text:style-name="P2"><text:bookmark text:name="code-block-viewer Copia 28"/><text:span text:style-name="Source_20_Text">interface PaymentProvider {</text:span></text:p>
        <text:p text:style-name="Preformatted_20_Text"><text:span text:style-name="Source_20_Text"><text:s text:c="2"/>createPayment()</text:span></text:p>
        <text:p text:style-name="Preformatted_20_Text"><text:span text:style-name="Source_20_Text"><text:s text:c="2"/>getPayment()</text:span></text:p>
        <text:p text:style-name="Preformatted_20_Text"><text:span text:style-name="Source_20_Text"><text:s text:c="2"/>refundPayment()</text:span></text:p>
        <text:p text:style-name="P1"><text:span text:style-name="Source_20_Text">}</text:span></text:p>
      </text:section>
      <text:p text:style-name="Text_20_body">Objetivo:</text:p>
      <text:list text:style-name="L9">
        <text:list-item>
          <text:p text:style-name="P14">Facilitar integração futura </text:p>
        </text:list-item>
        <text:list-item>
          <text:p text:style-name="P14">Evitar refatoração grande </text:p>
        </text:list-item>
        <text:list-item>
          <text:p text:style-name="P13">Permitir trocar gateway depois </text:p>
        </text:list-item>
      </text:list>
      <text:p text:style-name="Horizontal_20_Line"/>
      <text:h text:style-name="Heading_20_1" text:outline-level="1">Estrutura Final Após Etapa 2</text:h>
      <text:section text:style-name="Sect1" text:name="Seção30">
        <text:p text:style-name="P2"><text:bookmark text:name="code-block-viewer Copia 29"/><text:span text:style-name="Source_20_Text">src/</text:span></text:p>
        <text:p text:style-name="Preformatted_20_Text"><text:span text:style-name="Source_20_Text">├── auth/</text:span></text:p>
        <text:p text:style-name="Preformatted_20_Text"><text:span text:style-name="Source_20_Text">├── users/</text:span></text:p>
        <text:p text:style-name="Preformatted_20_Text"><text:span text:style-name="Source_20_Text">├── products/</text:span></text:p>
        <text:p text:style-name="Preformatted_20_Text"><text:span text:style-name="Source_20_Text">├── uploads/</text:span></text:p>
        <text:p text:style-name="Preformatted_20_Text"><text:span text:style-name="Source_20_Text">├── dashboard/</text:span></text:p>
        <text:p text:style-name="Preformatted_20_Text"><text:span text:style-name="Source_20_Text">├── reports/</text:span></text:p>
        <text:p text:style-name="Preformatted_20_Text"><text:span text:style-name="Source_20_Text">├── audit/</text:span></text:p>
        <text:p text:style-name="Preformatted_20_Text"><text:soft-page-break/><text:span text:style-name="Source_20_Text">├── permissions/</text:span></text:p>
        <text:p text:style-name="Preformatted_20_Text"><text:span text:style-name="Source_20_Text">├── payments/</text:span></text:p>
        <text:p text:style-name="Preformatted_20_Text"><text:span text:style-name="Source_20_Text">│ <text:s text:c="2"/>└── mercadopago/</text:span></text:p>
        <text:p text:style-name="Preformatted_20_Text"><text:span text:style-name="Source_20_Text">├── common/</text:span></text:p>
        <text:p text:style-name="Preformatted_20_Text"><text:span text:style-name="Source_20_Text">├── database/</text:span></text:p>
        <text:p text:style-name="P1"><text:span text:style-name="Source_20_Text">└── config/</text:span></text:p>
      </text:section>
      <text:h text:style-name="Heading_20_1" text:outline-level="1">Banco de Dados</text:h>
      <text:p text:style-name="Text_20_body">Tabelas principais:</text:p>
      <text:section text:style-name="Sect1" text:name="Seção31">
        <text:p text:style-name="P2"><text:bookmark text:name="code-block-viewer Copia 30"/><text:span text:style-name="Source_20_Text">users</text:span></text:p>
        <text:p text:style-name="Preformatted_20_Text"><text:span text:style-name="Source_20_Text">password_resets</text:span></text:p>
        <text:p text:style-name="Preformatted_20_Text"><text:span text:style-name="Source_20_Text">products</text:span></text:p>
        <text:p text:style-name="P1"><text:span text:style-name="Source_20_Text">audit_logs</text:span></text:p>
      </text:section>
      <text:p text:style-name="Text_20_body">Tabelas opcionais:</text:p>
      <text:section text:style-name="Sect1" text:name="Seção32">
        <text:p text:style-name="P2"><text:bookmark text:name="code-block-viewer Copia 31"/><text:span text:style-name="Source_20_Text">product_categories</text:span></text:p>
        <text:p text:style-name="Preformatted_20_Text"><text:span text:style-name="Source_20_Text">files</text:span></text:p>
        <text:p text:style-name="Preformatted_20_Text"><text:span text:style-name="Source_20_Text">roles</text:span></text:p>
        <text:p text:style-name="P1"><text:span text:style-name="Source_20_Text">permissions</text:span></text:p>
      </text:section>
      <text:h text:style-name="Heading_20_1" text:outline-level="1">Resultado da Etapa 2</text:h>
      <text:p text:style-name="Text_20_body">Ao final desta etapa o sistema terá:</text:p>
      <text:p text:style-name="Text_20_body">✅ Autenticação JWT completa<text:line-break/>✅ Login administrativo<text:line-break/>✅ Recuperação de senha<text:line-break/>✅ CRUD de produtos<text:line-break/>✅ Upload de PDFs<text:line-break/>✅ Upload de imagens<text:line-break/>✅ Dashboard administrativo<text:line-break/>✅ Relatórios exportáveis<text:line-break/>✅ Controle de acesso RBAC<text:line-break/>✅ Auditoria de ações<text:line-break/>✅ Arquitetura preparada para Mercado Pago</text:p>
      <text:p text:style-name="Text_20_body">Isso já caracteriza um backend MVP pronto para ser consumido por um painel administrativo em React/Next.js ou por aplicativos mobi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08:53:09.001978323</meta:creation-date>
    <dc:date>2026-06-10T10:35:34.807271678</dc:date>
    <meta:editing-duration>PT1H32M12S</meta:editing-duration>
    <meta:editing-cycles>1</meta:editing-cycles>
    <meta:document-statistic meta:table-count="0" meta:image-count="0" meta:object-count="0" meta:page-count="18" meta:paragraph-count="568" meta:word-count="1226" meta:character-count="8149" meta:non-whitespace-character-count="7382"/>
    <meta:generator>LibreOffice/24.2.7.2$Linux_X86_64 LibreOffice_project/420$Build-2</meta:generator>
  </office:meta>
</office:document-meta>
</file>